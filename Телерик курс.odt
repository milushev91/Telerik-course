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Code" svg:font-family="'Cascadia Code', 'Fira Code', 'JetBrains Mono', monospace"/>
    <style:font-face style:name="Inter" svg:font-family="Inter, system-ui, apple-system, sans-serif"/>
    <style:font-face style:name="Lebration serif" svg:font-family="'Lebra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Liberian serif" svg:font-family="'Liberian serif'"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oppins" svg:font-family="Poppins, Montserrat, sans-serif"/>
    <style:font-face style:name="source-code-pro" svg:font-family="source-code-pro, Menlo, Monaco, Consolas, 'Courier New', monospace"/>
  </office:font-face-decls>
  <office:automatic-styles>
    <style:style style:name="P1" style:family="paragraph" style:parent-style-name="Text_20_body">
      <style:paragraph-properties fo:margin-left="0cm" fo:margin-right="0cm" fo:orphans="2" fo:widows="2" fo:text-indent="0cm" style:auto-text-indent="false" fo:padding="0cm" fo:border="none"/>
      <style:text-properties fo:font-variant="normal" fo:text-transform="none" fo:color="#101828" loext:opacity="100%" style:font-name="Poppins" fo:font-size="12pt" fo:letter-spacing="normal" fo:font-style="normal" fo:font-weight="normal"/>
    </style:style>
    <style:style style:name="P2" style:family="paragraph" style:parent-style-name="Standard">
      <style:text-properties fo:font-variant="normal" fo:text-transform="none" fo:color="#101828" loext:opacity="100%" style:font-name="Poppins" fo:font-size="16pt" fo:letter-spacing="normal" fo:font-style="normal" fo:font-weight="bold" officeooo:paragraph-rsid="00245887" style:font-size-asian="16pt" style:font-weight-asian="bold" style:font-size-complex="16pt" style:font-weight-complex="bold"/>
    </style:style>
    <style:style style:name="P3" style:family="paragraph" style:parent-style-name="Standard">
      <style:text-properties fo:font-variant="normal" fo:text-transform="none" fo:color="#101828" loext:opacity="100%" style:font-name="Poppins" fo:font-size="14pt" fo:letter-spacing="normal" fo:language="en" fo:country="US" fo:font-style="normal" fo:font-weight="bold" officeooo:rsid="002711ad" officeooo:paragraph-rsid="002711ad" style:font-size-asian="14pt" style:font-weight-asian="bold" style:font-size-complex="14pt" style:font-weight-complex="bold"/>
    </style:style>
    <style:style style:name="P4" style:family="paragraph" style:parent-style-name="Standard">
      <style:text-properties fo:font-variant="normal" fo:text-transform="none" fo:color="#101828" loext:opacity="100%" style:font-name="Poppins" fo:font-size="14pt" fo:letter-spacing="normal" fo:language="en" fo:country="US" fo:font-style="normal" fo:font-weight="bold" officeooo:rsid="002711ad" officeooo:paragraph-rsid="002711ad" style:font-size-asian="12.25pt" style:font-weight-asian="bold" style:font-size-complex="14pt" style:font-weight-complex="bold" loext:padding="0cm" loext:border="none"/>
    </style:style>
    <style:style style:name="P5" style:family="paragraph" style:parent-style-name="Standard">
      <style:text-properties fo:font-variant="normal" fo:text-transform="none" fo:color="#101828" loext:opacity="100%" style:font-name="Poppins" fo:font-size="14pt" fo:letter-spacing="normal" fo:font-style="normal" fo:font-weight="bold" officeooo:paragraph-rsid="00245887" style:font-size-asian="14pt" style:font-weight-asian="bold" style:font-size-complex="14pt" style:font-weight-complex="bold"/>
    </style:style>
    <style:style style:name="P6" style:family="paragraph" style:parent-style-name="Standard">
      <style:text-properties fo:font-variant="normal" fo:text-transform="none" fo:color="#101828" loext:opacity="100%" style:font-name="Poppins" fo:font-size="12pt" fo:letter-spacing="normal" fo:font-style="normal" fo:font-weight="normal" officeooo:paragraph-rsid="00245887"/>
    </style:style>
    <style:style style:name="P7" style:family="paragraph" style:parent-style-name="Standard" style:list-style-name="L3">
      <style:text-properties fo:font-variant="normal" fo:text-transform="none" fo:color="#101828" loext:opacity="100%" style:font-name="Poppins" fo:font-size="12pt" fo:letter-spacing="normal" fo:font-style="normal" fo:font-weight="normal" officeooo:paragraph-rsid="00245887"/>
    </style:style>
    <style:style style:name="P8" style:family="paragraph" style:parent-style-name="Standard" style:list-style-name="L4">
      <style:text-properties fo:font-variant="normal" fo:text-transform="none" fo:color="#101828" loext:opacity="100%" style:font-name="Poppins" fo:font-size="12pt" fo:letter-spacing="normal" fo:font-style="normal" fo:font-weight="normal" officeooo:paragraph-rsid="00245887"/>
    </style:style>
    <style:style style:name="P9" style:family="paragraph" style:parent-style-name="Standard">
      <style:text-properties fo:font-variant="normal" fo:text-transform="none" fo:color="#101828" loext:opacity="100%" style:font-name="Poppins" fo:font-size="12pt" fo:letter-spacing="normal" fo:font-style="normal" fo:font-weight="bold" officeooo:paragraph-rsid="00245887" style:font-weight-asian="bold" style:font-weight-complex="bold"/>
    </style:style>
    <style:style style:name="P10" style:family="paragraph" style:parent-style-name="Standard" style:list-style-name="L2">
      <style:text-properties officeooo:paragraph-rsid="00245887"/>
    </style:style>
    <style:style style:name="P11" style:family="paragraph" style:parent-style-name="Standard" style:list-style-name="L3">
      <style:text-properties officeooo:paragraph-rsid="00245887"/>
    </style:style>
    <style:style style:name="P12" style:family="paragraph" style:parent-style-name="Standard" style:list-style-name="L4">
      <style:text-properties officeooo:paragraph-rsid="00245887"/>
    </style:style>
    <style:style style:name="P13" style:family="paragraph" style:parent-style-name="Standard" style:list-style-name="L5">
      <style:text-properties officeooo:paragraph-rsid="002711ad"/>
    </style:style>
    <style:style style:name="P14" style:family="paragraph" style:parent-style-name="Standard">
      <style:text-properties fo:font-size="18pt" fo:language="en" fo:country="US" fo:font-weight="bold" officeooo:rsid="001edae8" officeooo:paragraph-rsid="00150db8" style:font-size-asian="15.75pt" style:font-weight-asian="bold" style:font-size-complex="18pt" style:font-weight-complex="bold"/>
    </style:style>
    <style:style style:name="P15" style:family="paragraph" style:parent-style-name="Standard">
      <style:paragraph-properties>
        <style:tab-stops>
          <style:tab-stop style:position="3.81cm"/>
        </style:tab-stops>
      </style:paragraph-properties>
      <style:text-properties fo:font-size="12pt" fo:language="en" fo:country="US" fo:font-weight="normal" officeooo:rsid="001edae8" officeooo:paragraph-rsid="00150db8" style:font-size-asian="10.5pt" style:font-weight-asian="normal" style:font-size-complex="12pt" style:font-weight-complex="normal"/>
    </style:style>
    <style:style style:name="P16" style:family="paragraph" style:parent-style-name="Standard">
      <style:paragraph-properties>
        <style:tab-stops>
          <style:tab-stop style:position="3.81cm"/>
        </style:tab-stops>
      </style:paragraph-properties>
      <style:text-properties fo:font-size="12pt" fo:language="en" fo:country="US" fo:font-weight="normal" officeooo:rsid="002711ad" officeooo:paragraph-rsid="002711ad" style:font-size-asian="10.5pt" style:font-weight-asian="normal" style:font-size-complex="12pt" style:font-weight-complex="normal"/>
    </style:style>
    <style:style style:name="P17" style:family="paragraph" style:parent-style-name="Standard">
      <style:paragraph-properties>
        <style:tab-stops>
          <style:tab-stop style:position="3.81cm"/>
        </style:tab-stops>
      </style:paragraph-properties>
      <style:text-properties fo:font-size="12pt" fo:language="en" fo:country="US" fo:font-weight="normal" officeooo:rsid="00273c00" officeooo:paragraph-rsid="00273c00" style:font-size-asian="10.5pt" style:font-weight-asian="normal" style:font-size-complex="12pt" style:font-weight-complex="normal"/>
    </style:style>
    <style:style style:name="P18" style:family="paragraph" style:parent-style-name="Standard">
      <style:paragraph-properties>
        <style:tab-stops>
          <style:tab-stop style:position="3.81cm"/>
        </style:tab-stops>
      </style:paragraph-properties>
      <style:text-properties fo:font-size="12pt" fo:language="en" fo:country="US" fo:font-weight="bold" officeooo:rsid="002711ad" officeooo:paragraph-rsid="002711ad" style:font-size-asian="10.5pt" style:font-weight-asian="bold" style:font-size-complex="12pt" style:font-weight-complex="bold"/>
    </style:style>
    <style:style style:name="P19" style:family="paragraph" style:parent-style-name="Standard">
      <style:paragraph-properties>
        <style:tab-stops>
          <style:tab-stop style:position="3.81cm"/>
        </style:tab-stops>
      </style:paragraph-properties>
      <style:text-properties fo:font-size="12pt" fo:language="en" fo:country="US" fo:font-weight="bold" officeooo:rsid="00273c00" officeooo:paragraph-rsid="00273c00" style:font-size-asian="10.5pt" style:font-weight-asian="bold" style:font-size-complex="12pt" style:font-weight-complex="bold"/>
    </style:style>
    <style:style style:name="P20" style:family="paragraph" style:parent-style-name="Standard" style:list-style-name="L6">
      <style:paragraph-properties>
        <style:tab-stops>
          <style:tab-stop style:position="3.81cm"/>
        </style:tab-stops>
      </style:paragraph-properties>
      <style:text-properties officeooo:paragraph-rsid="002711ad"/>
    </style:style>
    <style:style style:name="P21" style:family="paragraph" style:parent-style-name="Standard" style:list-style-name="L7">
      <style:paragraph-properties>
        <style:tab-stops>
          <style:tab-stop style:position="3.81cm"/>
        </style:tab-stops>
      </style:paragraph-properties>
      <style:text-properties officeooo:paragraph-rsid="002711ad"/>
    </style:style>
    <style:style style:name="P22" style:family="paragraph" style:parent-style-name="Standard" style:list-style-name="L8">
      <style:paragraph-properties>
        <style:tab-stops>
          <style:tab-stop style:position="3.81cm"/>
        </style:tab-stops>
      </style:paragraph-properties>
      <style:text-properties officeooo:paragraph-rsid="00273c00"/>
    </style:style>
    <style:style style:name="P23" style:family="paragraph" style:parent-style-name="Standard">
      <style:paragraph-properties>
        <style:tab-stops>
          <style:tab-stop style:position="3.81cm"/>
        </style:tab-stops>
      </style:paragraph-properties>
      <style:text-properties officeooo:paragraph-rsid="00273c00"/>
    </style:style>
    <style:style style:name="P24" style:family="paragraph" style:parent-style-name="Standard" style:list-style-name="L9">
      <style:paragraph-properties>
        <style:tab-stops>
          <style:tab-stop style:position="3.81cm"/>
        </style:tab-stops>
      </style:paragraph-properties>
      <style:text-properties officeooo:paragraph-rsid="00273c00"/>
    </style:style>
    <style:style style:name="P25" style:family="paragraph" style:parent-style-name="Standard">
      <style:paragraph-properties>
        <style:tab-stops>
          <style:tab-stop style:position="3.81cm"/>
        </style:tab-stops>
      </style:paragraph-properties>
      <style:text-properties fo:font-size="14pt" fo:language="en" fo:country="US" fo:font-weight="bold" officeooo:rsid="002711ad" officeooo:paragraph-rsid="002711ad" style:font-size-asian="14pt" style:font-weight-asian="bold" style:font-size-complex="14pt" style:font-weight-complex="bold"/>
    </style:style>
    <style:style style:name="P26" style:family="paragraph" style:parent-style-name="Standard">
      <style:paragraph-properties>
        <style:tab-stops>
          <style:tab-stop style:position="3.81cm"/>
        </style:tab-stops>
      </style:paragraph-properties>
      <style:text-properties fo:font-size="14pt" fo:language="en" fo:country="US" fo:font-weight="bold" officeooo:rsid="00273c00" officeooo:paragraph-rsid="00273c00" style:font-size-asian="14pt" style:font-weight-asian="bold" style:font-size-complex="14pt" style:font-weight-complex="bold"/>
    </style:style>
    <style:style style:name="P27" style:family="paragraph" style:parent-style-name="Standard">
      <style:paragraph-properties>
        <style:tab-stops>
          <style:tab-stop style:position="3.81cm"/>
        </style:tab-stops>
      </style:paragraph-properties>
      <style:text-properties fo:font-size="14pt" fo:font-weight="bold" officeooo:rsid="0027e593" officeooo:paragraph-rsid="0027e593" style:font-size-asian="14pt" style:font-weight-asian="bold" style:font-size-complex="14pt" style:font-weight-complex="bold"/>
    </style:style>
    <style:style style:name="P28" style:family="paragraph" style:parent-style-name="Text_20_body" style:list-style-name="L15">
      <style:paragraph-properties fo:margin-top="0cm" fo:margin-bottom="0.085cm" style:contextual-spacing="false" fo:line-height="155%" fo:orphans="2" fo:widows="2" fo:padding="0cm" fo:border="none"/>
      <style:text-properties officeooo:paragraph-rsid="00297d50"/>
    </style:style>
    <style:style style:name="P29" style:family="paragraph" style:parent-style-name="Text_20_body" style:list-style-name="L17">
      <style:paragraph-properties fo:margin-top="0cm" fo:margin-bottom="0.085cm" style:contextual-spacing="false" fo:line-height="155%" fo:orphans="2" fo:widows="2" fo:padding="0cm" fo:border="none"/>
      <style:text-properties officeooo:paragraph-rsid="002a3ada"/>
    </style:style>
    <style:style style:name="P30" style:family="paragraph" style:parent-style-name="Text_20_body" style:list-style-name="L21">
      <style:paragraph-properties fo:margin-top="0cm" fo:margin-bottom="0.085cm" style:contextual-spacing="false" fo:line-height="155%" fo:orphans="2" fo:widows="2" fo:padding="0cm" fo:border="none"/>
      <style:text-properties officeooo:paragraph-rsid="002bb335"/>
    </style:style>
    <style:style style:name="P31" style:family="paragraph" style:parent-style-name="Text_20_body" style:list-style-name="L11">
      <style:paragraph-properties>
        <style:tab-stops>
          <style:tab-stop style:position="3.81cm"/>
        </style:tab-stops>
      </style:paragraph-properties>
      <style:text-properties officeooo:paragraph-rsid="0027e593"/>
    </style:style>
    <style:style style:name="P32" style:family="paragraph" style:parent-style-name="Text_20_body" style:list-style-name="L13">
      <style:paragraph-properties>
        <style:tab-stops>
          <style:tab-stop style:position="3.81cm"/>
        </style:tab-stops>
      </style:paragraph-properties>
      <style:text-properties officeooo:paragraph-rsid="00288753"/>
    </style:style>
    <style:style style:name="P33" style:family="paragraph" style:parent-style-name="Text_20_body">
      <style:paragraph-properties>
        <style:tab-stops>
          <style:tab-stop style:position="3.81cm"/>
        </style:tab-stops>
      </style:paragraph-properties>
      <style:text-properties officeooo:paragraph-rsid="00288753"/>
    </style:style>
    <style:style style:name="P34" style:family="paragraph" style:parent-style-name="Text_20_body">
      <style:paragraph-properties>
        <style:tab-stops>
          <style:tab-stop style:position="3.81cm"/>
        </style:tab-stops>
      </style:paragraph-properties>
      <style:text-properties officeooo:paragraph-rsid="00297d50"/>
    </style:style>
    <style:style style:name="P35" style:family="paragraph" style:parent-style-name="Text_20_body" style:list-style-name="L22">
      <style:paragraph-properties>
        <style:tab-stops>
          <style:tab-stop style:position="3.81cm"/>
        </style:tab-stops>
      </style:paragraph-properties>
      <style:text-properties officeooo:paragraph-rsid="00273c00"/>
    </style:style>
    <style:style style:name="P36" style:family="paragraph" style:parent-style-name="Text_20_body">
      <style:paragraph-properties>
        <style:tab-stops>
          <style:tab-stop style:position="3.81cm"/>
        </style:tab-stops>
      </style:paragraph-properties>
      <style:text-properties fo:language="en" fo:country="US" officeooo:rsid="00288753" officeooo:paragraph-rsid="00288753"/>
    </style:style>
    <style:style style:name="P37" style:family="paragraph" style:parent-style-name="Text_20_body">
      <style:paragraph-properties>
        <style:tab-stops>
          <style:tab-stop style:position="3.81cm"/>
        </style:tab-stops>
      </style:paragraph-properties>
      <style:text-properties fo:font-size="14pt" fo:language="en" fo:country="US" fo:font-weight="bold" officeooo:rsid="00288753" officeooo:paragraph-rsid="00288753" style:font-size-asian="14pt" style:font-weight-asian="bold" style:font-size-complex="14pt" style:font-weight-complex="bold"/>
    </style:style>
    <style:style style:name="P38" style:family="paragraph" style:parent-style-name="Text_20_body">
      <style:paragraph-properties fo:margin-top="0cm" fo:margin-bottom="0.085cm" style:contextual-spacing="false" fo:line-height="155%" fo:orphans="2" fo:widows="2" fo:padding="0cm" fo:border="none"/>
      <style:text-properties fo:font-size="14pt" fo:language="en" fo:country="US" fo:font-weight="bold" officeooo:rsid="002a3ada" officeooo:paragraph-rsid="002a3ada" style:font-size-asian="14pt" style:font-weight-asian="bold" style:font-size-complex="14pt" style:font-weight-complex="bold"/>
    </style:style>
    <style:style style:name="P39" style:family="paragraph" style:parent-style-name="Text_20_body">
      <style:paragraph-properties>
        <style:tab-stops>
          <style:tab-stop style:position="3.81cm"/>
        </style:tab-stops>
      </style:paragraph-properties>
      <style:text-properties fo:font-size="14pt" fo:language="en" fo:country="US" fo:font-weight="bold" officeooo:rsid="002a3ada" officeooo:paragraph-rsid="002a3ada" style:font-size-asian="14pt" style:font-weight-asian="bold" style:font-size-complex="14pt" style:font-weight-complex="bold"/>
    </style:style>
    <style:style style:name="P40" style:family="paragraph" style:parent-style-name="Text_20_body">
      <style:paragraph-properties>
        <style:tab-stops>
          <style:tab-stop style:position="3.81cm"/>
        </style:tab-stops>
      </style:paragraph-properties>
      <style:text-properties fo:font-size="14pt" fo:language="en" fo:country="US" fo:font-weight="bold" officeooo:rsid="002bb335" officeooo:paragraph-rsid="002bb335" style:font-size-asian="14pt" style:font-weight-asian="bold" style:font-size-complex="14pt" style:font-weight-complex="bold"/>
    </style:style>
    <style:style style:name="P41" style:family="paragraph" style:parent-style-name="Text_20_body">
      <style:paragraph-properties>
        <style:tab-stops>
          <style:tab-stop style:position="3.81cm"/>
        </style:tab-stops>
      </style:paragraph-properties>
      <style:text-properties fo:font-size="12pt" officeooo:paragraph-rsid="00288753" style:font-size-asian="12pt" style:font-size-complex="12pt"/>
    </style:style>
    <style:style style:name="P42" style:family="paragraph" style:parent-style-name="Text_20_body" style:list-style-name="L19">
      <style:paragraph-properties>
        <style:tab-stops>
          <style:tab-stop style:position="3.598cm"/>
        </style:tab-stops>
      </style:paragraph-properties>
      <style:text-properties officeooo:paragraph-rsid="002a3ada"/>
    </style:style>
    <style:style style:name="T1" style:family="text">
      <style:text-properties fo:language="en" fo:country="US"/>
    </style:style>
    <style:style style:name="T2" style:family="text">
      <style:text-properties fo:language="en" fo:country="US" fo:font-weight="normal" officeooo:rsid="00273c00" style:font-weight-asian="normal" style:font-weight-complex="normal"/>
    </style:style>
    <style:style style:name="T3" style:family="text">
      <style:text-properties fo:language="en" fo:country="US" officeooo:rsid="00273c00"/>
    </style:style>
    <style:style style:name="T4" style:family="text">
      <style:text-properties fo:font-weight="bold" style:font-weight-asian="bold" style:font-weight-complex="bold"/>
    </style:style>
    <style:style style:name="T5" style:family="text">
      <style:text-properties fo:font-variant="normal" fo:text-transform="none" fo:color="#101828" loext:opacity="100%" style:font-name="Poppins" fo:font-size="12pt" fo:letter-spacing="normal" fo:font-style="normal" fo:font-weight="normal"/>
    </style:style>
    <style:style style:name="T6" style:family="text">
      <style:text-properties fo:font-variant="normal" fo:text-transform="none" fo:color="#101828" loext:opacity="100%" style:font-name="Poppins" fo:font-size="12pt" fo:letter-spacing="normal" fo:font-style="normal" fo:font-weight="bold" style:font-weight-asian="bold" style:font-weight-complex="bold"/>
    </style:style>
    <style:style style:name="T7" style:family="text">
      <style:text-properties fo:font-variant="normal" fo:text-transform="none" fo:color="#1a1a2e" loext:opacity="100%" style:font-name="Inter" fo:font-size="7.80000019073486pt" fo:letter-spacing="normal" fo:language="en" fo:country="US" fo:font-style="normal" fo:font-weight="bold" officeooo:rsid="00273c00" style:font-size-asian="10.5pt" style:font-size-complex="12pt"/>
    </style:style>
    <style:style style:name="T8" style:family="text">
      <style:text-properties fo:font-variant="normal" fo:text-transform="none" fo:color="#1a1a2e" loext:opacity="100%" style:font-name="Inter" fo:font-size="7.80000019073486pt" fo:letter-spacing="normal" fo:language="en" fo:country="US" fo:font-style="normal" fo:font-weight="normal" officeooo:rsid="00273c00" style:font-size-asian="10.5pt" style:font-weight-asian="normal" style:font-size-complex="12pt" style:font-weight-complex="normal"/>
    </style:style>
    <style:style style:name="T9" style:family="text">
      <style:text-properties fo:font-variant="normal" fo:text-transform="none" fo:color="#1a1a2e" loext:opacity="100%" style:font-name="Inter" fo:font-size="7.80000019073486pt" fo:letter-spacing="normal" fo:font-style="normal" fo:font-weight="bold"/>
    </style:style>
    <style:style style:name="T10" style:family="text">
      <style:text-properties fo:font-variant="normal" fo:text-transform="none" fo:color="#1a1a2e" loext:opacity="100%" style:font-name="Inter" fo:font-size="7.80000019073486pt" fo:letter-spacing="normal" fo:font-style="normal" fo:font-weight="bold" style:font-size-asian="12pt" style:font-size-complex="12pt"/>
    </style:style>
    <style:style style:name="T11" style:family="text">
      <style:text-properties fo:font-variant="normal" fo:text-transform="none" fo:color="#1a1a2e" loext:opacity="100%" style:font-name="Inter" fo:font-size="7.80000019073486pt" fo:letter-spacing="normal" fo:font-style="normal" fo:font-weight="normal"/>
    </style:style>
    <style:style style:name="T12" style:family="text">
      <style:text-properties fo:font-variant="normal" fo:text-transform="none" fo:color="#1a1a2e" loext:opacity="100%" style:font-name="Inter" fo:font-size="7.80000019073486pt" fo:letter-spacing="normal" fo:font-style="normal" fo:font-weight="normal" style:font-size-asian="12pt" style:font-size-complex="12pt"/>
    </style:style>
    <style:style style:name="T13" style:family="text">
      <style:text-properties fo:font-variant="normal" fo:text-transform="none" fo:color="#1a1a2e" loext:opacity="100%" style:font-name="Inter" fo:font-size="7.80000019073486pt" fo:letter-spacing="normal" fo:font-style="italic" fo:font-weight="normal"/>
    </style:style>
    <style:style style:name="T14" style:family="text">
      <style:text-properties fo:font-variant="normal" fo:text-transform="none" fo:color="#1a1a2e" loext:opacity="100%" style:font-name="Inter" fo:font-size="12pt" fo:letter-spacing="normal" fo:font-style="normal" fo:font-weight="bold" style:font-size-asian="12pt" style:font-size-complex="12pt"/>
    </style:style>
    <style:style style:name="T15" style:family="text">
      <style:text-properties fo:font-variant="normal" fo:text-transform="none" fo:color="#1a1a2e" loext:opacity="100%" style:font-name="Inter" fo:font-size="12pt" fo:letter-spacing="normal" fo:font-style="normal" fo:font-weight="normal" style:font-size-asian="12pt" style:font-size-complex="12pt"/>
    </style:style>
    <style:style style:name="T16" style:family="text">
      <style:text-properties fo:font-variant="normal" fo:text-transform="none" fo:color="#1a1a2e" loext:opacity="100%" style:font-name="Inter" fo:font-size="12pt" fo:letter-spacing="normal" fo:font-style="normal" style:font-size-asian="12pt" style:font-size-complex="12pt"/>
    </style:style>
    <style:style style:name="T17" style:family="text">
      <style:text-properties fo:font-variant="normal" fo:text-transform="none" fo:color="#1a1a2e" loext:opacity="100%" style:font-name="Inter" fo:font-size="12pt" fo:letter-spacing="normal" fo:language="en" fo:country="US" fo:font-style="normal" fo:font-weight="bold" officeooo:rsid="002a3ada" style:font-size-asian="12pt" style:font-size-complex="12pt"/>
    </style:style>
    <style:style style:name="T18" style:family="text">
      <style:text-properties fo:font-variant="normal" fo:text-transform="none" fo:color="#1a1a2e" loext:opacity="100%" style:font-name="Inter" fo:font-size="12pt" fo:letter-spacing="normal" fo:language="en" fo:country="US" fo:font-style="normal" fo:font-weight="bold" officeooo:rsid="00273c00" style:font-size-asian="12pt" style:font-size-complex="12pt"/>
    </style:style>
    <style:style style:name="T19" style:family="text">
      <style:text-properties fo:font-variant="normal" fo:text-transform="none" fo:color="#1a1a2e" loext:opacity="100%" style:font-name="Inter" fo:font-size="12pt" fo:letter-spacing="normal" fo:language="en" fo:country="US" fo:font-style="normal" fo:font-weight="normal" officeooo:rsid="002a3ada" style:font-size-asian="12pt" style:font-size-complex="12pt"/>
    </style:style>
    <style:style style:name="T20" style:family="text">
      <style:text-properties fo:font-variant="normal" fo:text-transform="none" fo:color="#1a1a2e" loext:opacity="100%" style:font-name="Inter" fo:font-size="12pt" fo:letter-spacing="normal" fo:language="en" fo:country="US" fo:font-style="normal" fo:font-weight="normal" officeooo:rsid="00273c00" style:font-size-asian="12pt" style:font-weight-asian="normal" style:font-size-complex="12pt" style:font-weight-complex="normal"/>
    </style:style>
    <style:style style:name="T21" style:family="text">
      <style:text-properties fo:font-variant="normal" fo:text-transform="none" fo:color="#1a1a2e" loext:opacity="100%" style:font-name="Inter" fo:font-size="12pt" fo:letter-spacing="normal" fo:font-style="italic" fo:font-weight="normal" style:font-size-asian="12pt" style:font-size-complex="12pt"/>
    </style:style>
    <style:style style:name="T22" style:family="text">
      <style:text-properties fo:font-variant="normal" fo:text-transform="none" fo:color="#1a1a2e" loext:opacity="100%" style:font-name="Inter" fo:letter-spacing="normal" fo:font-style="normal"/>
    </style:style>
    <style:style style:name="T23" style:family="text">
      <style:text-properties fo:font-variant="normal" fo:text-transform="none" fo:color="#1a1a2e" loext:opacity="100%" style:font-name="Inter" fo:letter-spacing="normal" fo:font-style="normal" fo:font-weight="bold"/>
    </style:style>
    <style:style style:name="T24" style:family="text">
      <style:text-properties fo:font-variant="normal" fo:text-transform="none" fo:color="#1a1a2e" loext:opacity="100%" style:font-name="Inter" fo:letter-spacing="normal" fo:font-style="normal" fo:font-weight="normal"/>
    </style:style>
    <style:style style:name="T25" style:family="text">
      <style:text-properties fo:font-variant="normal" fo:text-transform="none" fo:color="#1a1a2e" loext:opacity="100%" style:font-name="Inter" fo:letter-spacing="normal" fo:language="en" fo:country="US" fo:font-style="normal" fo:font-weight="bold" officeooo:rsid="00273c00"/>
    </style:style>
    <style:style style:name="T26" style:family="text">
      <style:text-properties fo:font-variant="normal" fo:text-transform="none" fo:color="#1a1a2e" loext:opacity="100%" style:font-name="Inter" fo:letter-spacing="normal" fo:language="en" fo:country="US" fo:font-style="normal" fo:font-weight="normal" officeooo:rsid="00273c00" style:font-weight-asian="normal" style:font-weight-complex="normal"/>
    </style:style>
    <style:style style:name="T27" style:family="text">
      <style:text-properties fo:font-variant="normal" fo:text-transform="none" fo:color="#1a1a2e" loext:opacity="100%" style:font-name="Inter" fo:letter-spacing="normal" fo:font-style="italic" fo:font-weight="normal"/>
    </style:style>
    <style:style style:name="T28" style:family="text">
      <style:text-properties fo:font-variant="normal" fo:text-transform="none" fo:color="#1a1a2e" loext:opacity="100%" style:font-name="Inter" fo:font-size="14pt" fo:letter-spacing="normal" fo:font-style="normal" fo:font-weight="bold" style:font-size-asian="14pt" style:font-size-complex="14pt"/>
    </style:style>
    <style:style style:name="T29" style:family="text">
      <style:text-properties fo:font-variant="normal" fo:text-transform="none" fo:color="#1a1a2e" loext:opacity="100%" style:font-name="Inter" fo:font-size="14pt" fo:letter-spacing="normal" fo:font-style="normal" fo:font-weight="bold" style:font-size-asian="14pt" style:font-weight-asian="bold" style:font-size-complex="14pt" style:font-weight-complex="bold"/>
    </style:style>
    <style:style style:name="T30" style:family="text">
      <style:text-properties fo:font-variant="normal" fo:text-transform="none" fo:color="#1a1a2e" loext:opacity="100%" style:font-name="Inter" fo:font-size="14pt" fo:letter-spacing="normal" fo:font-style="normal" fo:font-weight="normal" style:font-size-asian="14pt" style:font-size-complex="14pt"/>
    </style:style>
    <style:style style:name="T31" style:family="text">
      <style:text-properties fo:font-variant="normal" fo:text-transform="none" fo:color="#1a1a2e" loext:opacity="100%" style:font-name="Inter" fo:font-size="14pt" fo:letter-spacing="normal" fo:font-style="normal" style:font-size-asian="14pt" style:font-size-complex="14pt"/>
    </style:style>
    <style:style style:name="T32" style:family="text">
      <style:text-properties fo:font-variant="normal" fo:text-transform="none" fo:color="#1a1a2e" loext:opacity="100%" style:font-name="Cascadia Code" fo:font-size="7.80000019073486pt" fo:letter-spacing="normal" fo:font-style="normal" fo:font-weight="bold"/>
    </style:style>
    <style:style style:name="T33" style:family="text">
      <style:text-properties fo:font-variant="normal" fo:text-transform="none" fo:color="#1a1a2e" loext:opacity="100%" style:font-name="Cascadia Code" fo:font-size="7.80000019073486pt" fo:letter-spacing="normal" fo:font-style="normal" fo:font-weight="normal"/>
    </style:style>
    <style:style style:name="T34" style:family="text">
      <style:text-properties fo:font-variant="normal" fo:text-transform="none" fo:color="#1a1a2e" loext:opacity="100%" style:font-name="Cascadia Code" fo:letter-spacing="normal" fo:font-style="normal" fo:font-weight="normal"/>
    </style:style>
    <style:style style:name="T35" style:family="text">
      <style:text-properties fo:font-variant="normal" fo:text-transform="none" fo:color="#1a1a2e" loext:opacity="100%" style:font-name="Cascadia Code" fo:letter-spacing="normal" fo:font-style="normal" fo:font-weight="bold"/>
    </style:style>
    <style:style style:name="T36" style:family="text">
      <style:text-properties fo:font-variant="normal" fo:text-transform="none" fo:color="#1a1a2e" loext:opacity="100%" style:font-name="Cascadia Code" fo:font-size="12pt" fo:letter-spacing="normal" fo:font-style="normal" fo:font-weight="normal" style:font-size-asian="12pt" style:font-size-complex="12pt"/>
    </style:style>
    <style:style style:name="T37" style:family="text">
      <style:text-properties fo:font-variant="normal" fo:text-transform="none" fo:color="#1a1a2e" loext:opacity="100%" style:font-name="Cascadia Code" fo:font-size="12pt" fo:letter-spacing="normal" fo:font-style="normal" fo:font-weight="bold" style:font-size-asian="12pt" style:font-size-complex="12pt"/>
    </style:style>
    <style:style style:name="T38" style:family="text">
      <style:text-properties fo:font-variant="normal" fo:text-transform="none" fo:color="#1a1a2e" loext:opacity="100%" style:font-name="Liberation serif" fo:font-size="12pt" fo:letter-spacing="normal" fo:language="en" fo:country="US" fo:font-style="normal" fo:font-weight="bold" officeooo:rsid="00273c00" style:font-size-asian="12pt" style:font-size-complex="12pt"/>
    </style:style>
    <style:style style:name="T39" style:family="text">
      <style:text-properties fo:font-variant="normal" fo:text-transform="none" fo:color="#1a1a2e" loext:opacity="100%" style:font-name="Liberation serif" fo:font-size="12pt" fo:letter-spacing="normal" fo:language="en" fo:country="US" fo:font-style="normal" fo:font-weight="normal" officeooo:rsid="00273c00" style:font-size-asian="12pt" style:font-weight-asian="normal" style:font-size-complex="12pt" style:font-weight-complex="normal"/>
    </style:style>
    <style:style style:name="T40" style:family="text">
      <style:text-properties fo:font-variant="normal" fo:text-transform="none" fo:color="#1a1a2e" loext:opacity="100%" style:font-name="Liberation serif" fo:font-size="12pt" fo:letter-spacing="normal" fo:font-style="normal" fo:font-weight="bold" style:font-size-asian="12pt" style:font-size-complex="12pt"/>
    </style:style>
    <style:style style:name="T41" style:family="text">
      <style:text-properties fo:font-variant="normal" fo:text-transform="none" fo:color="#1a1a2e" loext:opacity="100%" style:font-name="Liberation serif" fo:font-size="12pt" fo:letter-spacing="normal" fo:font-style="normal" fo:font-weight="normal" style:font-size-asian="12pt" style:font-size-complex="12pt"/>
    </style:style>
    <style:style style:name="T42" style:family="text">
      <style:text-properties fo:font-variant="normal" fo:text-transform="none" fo:color="#1a1a2e" loext:opacity="100%" style:font-name="Liberation serif" fo:font-size="12pt" fo:letter-spacing="normal" fo:font-style="normal" style:font-size-asian="12pt" style:font-size-complex="12pt"/>
    </style:style>
    <style:style style:name="T43" style:family="text">
      <style:text-properties fo:font-variant="normal" fo:text-transform="none" fo:color="#1a1a2e" loext:opacity="100%" style:font-name="Liberation serif" fo:letter-spacing="normal" fo:font-style="normal"/>
    </style:style>
    <style:style style:name="T44" style:family="text">
      <style:text-properties fo:font-variant="normal" fo:text-transform="none" fo:color="#1a1a2e" loext:opacity="100%" style:font-name="Liberation serif" fo:letter-spacing="normal" fo:font-style="normal" fo:font-weight="normal"/>
    </style:style>
    <style:style style:name="T45" style:family="text">
      <style:text-properties fo:font-variant="normal" fo:text-transform="none" fo:color="#1a1a2e" loext:opacity="100%" style:font-name="Liberation serif" fo:letter-spacing="normal" fo:language="en" fo:country="US" fo:font-style="normal" fo:font-weight="normal" officeooo:rsid="002a3ada"/>
    </style:style>
    <style:style style:name="T46" style:family="text">
      <style:text-properties fo:font-variant="normal" fo:text-transform="none" fo:color="#1a1a2e" loext:opacity="100%" fo:letter-spacing="normal" fo:language="en" fo:country="US" fo:font-style="normal" fo:font-weight="normal" officeooo:rsid="00288753"/>
    </style:style>
    <style:style style:name="T47" style:family="text">
      <style:text-properties fo:font-variant="normal" fo:text-transform="none" fo:color="#1a1a2e" loext:opacity="100%" style:font-name="Lebration serif" fo:font-size="12pt" fo:letter-spacing="normal" fo:font-style="normal" fo:font-weight="bold" style:font-size-asian="12pt" style:font-size-complex="12pt"/>
    </style:style>
    <style:style style:name="T48" style:family="text">
      <style:text-properties fo:font-variant="normal" fo:text-transform="none" fo:color="#1a1a2e" loext:opacity="100%" style:font-name="Lebration serif" fo:font-size="12pt" fo:letter-spacing="normal" fo:font-style="normal" fo:font-weight="normal" style:font-size-asian="12pt" style:font-size-complex="12pt"/>
    </style:style>
    <style:style style:name="T49" style:family="text">
      <style:text-properties fo:font-variant="normal" fo:text-transform="none" fo:color="#1a1a2e" loext:opacity="100%" style:font-name="Lebration serif" fo:font-size="12pt" fo:letter-spacing="normal" fo:language="en" fo:country="US" fo:font-style="normal" fo:font-weight="bold" officeooo:rsid="00288753" style:font-size-asian="12pt" style:font-size-complex="12pt"/>
    </style:style>
    <style:style style:name="T50" style:family="text">
      <style:text-properties fo:font-variant="normal" fo:text-transform="none" fo:color="#1a1a2e" loext:opacity="100%" style:font-name="Lebration serif" fo:font-size="12pt" fo:letter-spacing="normal" fo:language="en" fo:country="US" fo:font-style="normal" fo:font-weight="normal" officeooo:rsid="00288753" style:font-size-asian="12pt" style:font-size-complex="12pt"/>
    </style:style>
    <style:style style:name="T51" style:family="text">
      <style:text-properties fo:font-variant="normal" fo:text-transform="none" fo:color="#1a1a2e" loext:opacity="100%" style:font-name="Lebration serif" fo:letter-spacing="normal" fo:font-style="normal" fo:font-weight="normal"/>
    </style:style>
    <style:style style:name="T52" style:family="text">
      <style:text-properties fo:font-size="12pt" fo:language="en" fo:country="US" fo:font-weight="normal" officeooo:rsid="001edae8" style:font-size-asian="10.5pt" style:font-weight-asian="normal" style:font-size-complex="12pt" style:font-weight-complex="normal"/>
    </style:style>
    <style:style style:name="T53" style:family="text">
      <style:text-properties fo:font-size="12pt" fo:language="en" fo:country="US" fo:font-weight="normal" officeooo:rsid="002711ad" style:font-size-asian="10.5pt" style:font-weight-asian="normal" style:font-size-complex="12pt" style:font-weight-complex="normal"/>
    </style:style>
    <style:style style:name="T54" style:family="text">
      <style:text-properties fo:font-size="12pt" fo:language="en" fo:country="US" fo:font-weight="normal" officeooo:rsid="00273c00" style:font-size-asian="10.5pt" style:font-weight-asian="normal" style:font-size-complex="12pt" style:font-weight-complex="normal"/>
    </style:style>
    <style:style style:name="T55" style:family="text">
      <style:text-properties fo:font-size="12pt" fo:language="en" fo:country="US" fo:font-weight="bold" officeooo:rsid="001edae8" style:font-size-asian="10.5pt" style:font-weight-asian="bold" style:font-size-complex="12pt" style:font-weight-complex="bold"/>
    </style:style>
    <style:style style:name="T56" style:family="text">
      <style:text-properties fo:font-size="12pt" fo:language="en" fo:country="US" fo:font-weight="bold" officeooo:rsid="002711ad" style:font-size-asian="10.5pt" style:font-weight-asian="bold" style:font-size-complex="12pt" style:font-weight-complex="bol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to programming </text:p>
      <text:p text:style-name="P2"/>
      <text:p text:style-name="P3">Programming</text:p>
      <text:p text:style-name="P6"/>
      <text:p text:style-name="P9">1. What is Programming?</text:p>
      <text:p text:style-name="P9"/>
      <text:p text:style-name="P6">At its essence, programming is the process of creating a sequence of instructions that tell a computer how to perform a specific task. These tasks can range from simple calculations to complex operations like reading files, browsing the internet, or displaying graphics.</text:p>
      <text:p text:style-name="P6"/>
      <text:p text:style-name="P9">2. The Two Foundations of Every Program</text:p>
      <text:p text:style-name="P6">Every program, regardless of its size or complexity, consists of two main components:</text:p>
      <text:p text:style-name="P6"/>
      <text:list xml:id="list930263973" text:style-name="L2">
        <text:list-item>
          <text:p text:style-name="P10"><text:span text:style-name="T6">Data: </text:span><text:span text:style-name="T5">The information the program processes (like numbers, text, or user input).</text:span></text:p>
        </text:list-item>
        <text:list-item>
          <text:p text:style-name="P10"><text:span text:style-name="T6">Algorithms:</text:span><text:span text:style-name="T5"> The specific sequence of instructions that define how that data should be handled or modified.</text:span></text:p>
        </text:list-item>
      </text:list>
      <text:p text:style-name="P6"/>
      <text:p text:style-name="P9">3. Basic Elements in Code</text:p>
      <text:p text:style-name="P6">The lecture introduced a simple Python example to illustrate these concepts:</text:p>
      <text:p text:style-name="P6"/>
      <text:list xml:id="list1155700499" text:style-name="L3">
        <text:list-item>
          <text:p text:style-name="P11"><text:span text:style-name="T6">Variables: </text:span><text:span text:style-name="T5">Think of these as "containers" or boxes used to store data, each with a unique name (e.g., a = 10).</text:span></text:p>
        </text:list-item>
        <text:list-item>
          <text:p text:style-name="P11"><text:span text:style-name="T6">Functions: </text:span><text:span text:style-name="T5">These act as "black boxes" that perform specific tasks for us. We don't always need to know exactly how they work internally; we just need to know how to use them (e.g., the print() function).</text:span></text:p>
        </text:list-item>
        <text:list-item>
          <text:p text:style-name="P7"><text:span text:style-name="T4">Algorithms:</text:span> By combining variables and functions, we create a logical flow that acts as the algorithm to solve a problem.</text:p>
        </text:list-item>
      </text:list>
      <text:p text:style-name="P6"/>
      <text:p text:style-name="P9">4. Why We Program</text:p>
      <text:p text:style-name="P9"/>
      <text:p text:style-name="P6">Computers are powerful tools because they are:</text:p>
      <text:p text:style-name="P6"/>
      <text:list xml:id="list240992976" text:style-name="L4">
        <text:list-item>
          <text:p text:style-name="P8"><text:span text:style-name="T4">Extremely Fast: </text:span>They can process hundreds of millions of instructions per second.</text:p>
        </text:list-item>
        <text:list-item>
          <text:p text:style-name="P12"><text:span text:style-name="T6">Reliable and Predictable:</text:span><text:span text:style-name="T5"> They follow your instructions exactly as written.</text:span></text:p>
        </text:list-item>
      </text:list>
      <text:p text:style-name="P6"/>
      <text:p text:style-name="P6">Crucially, the lecture highlights that computers cannot "think" on their own. They rely entirely on the programmer to understand a problem and write the correct instructions to solve it. Success in programming requires two key skill sets: problem-solving and the ability to write precise code.</text:p>
      <text:p text:style-name="P6"/>
      <text:p text:style-name="P5">What is Python?</text:p>
      <text:p text:style-name="P6"/>
      <text:list xml:id="list4006696865" text:style-name="L5">
        <text:list-item>
          <text:p text:style-name="P13"><text:span text:style-name="T5">It is a high-level, multi-paradigm programming language designed specifically for readability and ease of use.</text:span></text:p>
        </text:list-item>
        <text:list-item>
          <text:p text:style-name="P13"><text:span text:style-name="T5">High-Level Nature: Python abstracts away low-level computer details (like hardware communication or memory management), allowing developers to focus entirely on solving functional problems.</text:span></text:p>
        </text:list-item>
        <text:list-item>
          <text:p text:style-name="P13"><text:span text:style-name="T5">Multi-paradigm Support: The language allows you to structure code in various ways, including procedural, functional, and object-oriented programming.</text:span></text:p>
        </text:list-item>
        <text:list-item>
          <text:p text:style-name="P13"><text:soft-page-break/><text:span text:style-name="T5">Simple Syntax: One of Python's greatest strengths is its expressive and simple syntax, which often resembles the English language, making it highly accessible for beginners.</text:span></text:p>
        </text:list-item>
        <text:list-item>
          <text:p text:style-name="P13"><text:span text:style-name="T5">Popularity and Modern Applications: Python has remained popular for over 30 years and has become a standard in modern fields like Artificial Intelligence and Data Analysis.</text:span></text:p>
        </text:list-item>
        <text:list-item>
          <text:p text:style-name="P13"><text:span text:style-name="T5">Versatility: You can use Python for a wide range of tasks, such as creating desktop applications, building web servers, or writing simple scripts for automation.</text:span></text:p>
        </text:list-item>
        <text:list-item>
          <text:p text:style-name="P13"><text:span text:style-name="T5">Accessibility for Beginners: It is open-source (free to use and study), has an immense amount of free educational resources, and can be set up on your machine in just a few minutes.</text:span></text:p>
        </text:list-item>
      </text:list>
      <text:p text:style-name="P1"/>
      <text:p text:style-name="P4">What is a terminal?</text:p>
      <text:p text:style-name="P14"/>
      <text:list xml:id="list1319331164" text:style-name="L6">
        <text:list-item>
          <text:p text:style-name="P20"><text:span text:style-name="T55">Understanding the Terminal:</text:span><text:span text:style-name="T52"> At its simplest, the terminal is a text-based interface that allows you to communicate with your operating system. Instead of using a mouse to click buttons (as in a graphical user interface or GUI), you type commands to tell the computer what to do.</text:span></text:p>
        </text:list-item>
        <text:list-item>
          <text:p text:style-name="P20"><text:span text:style-name="T55">Terminology (Terminal vs. Console vs. Shell):</text:span><text:span text:style-name="T52"> While these terms are sometimes used interchangeably in casual conversation, they have specific roles:</text:span></text:p>
          <text:list>
            <text:list-item>
              <text:p text:style-name="P20"><text:span text:style-name="T55">Terminal:</text:span><text:span text:style-name="T52"> The window or application you open.</text:span></text:p>
            </text:list-item>
            <text:list-item>
              <text:p text:style-name="P20"><text:span text:style-name="T55">Shell:</text:span><text:span text:style-name="T52"> The underlying program that reads your commands and executes them.</text:span></text:p>
            </text:list-item>
            <text:list-item>
              <text:p text:style-name="P20"><text:span text:style-name="T55">Console: </text:span><text:span text:style-name="T52">Often used informally as a synonym for the terminal window.</text:span></text:p>
            </text:list-item>
          </text:list>
        </text:list-item>
        <text:list-item>
          <text:p text:style-name="P20"><text:span text:style-name="T55">Why Developers Use It:</text:span><text:span text:style-name="T52"> It is a vital tool for developers because it is often faster, more precise, and provides greater control than a GUI. It is essential for tasks like using Git, managing software libraries, interacting with servers, and automating repetitive work.</text:span></text:p>
        </text:list-item>
        <text:list-item>
          <text:p text:style-name="P20"><text:span text:style-name="T55">Getting Started with Basics: </text:span><text:span text:style-name="T52">You don't need to be an expert to start. The lecture highlights three fundamental commands for navigation:</text:span></text:p>
          <text:list>
            <text:list-item>
              <text:p text:style-name="P20"><text:span text:style-name="T55">pwd:</text:span><text:span text:style-name="T52"> Shows you where you are in the file system.</text:span></text:p>
            </text:list-item>
            <text:list-item>
              <text:p text:style-name="P20"><text:span text:style-name="T55">ls: </text:span><text:span text:style-name="T52">Lists the files and folders in your current location.</text:span></text:p>
            </text:list-item>
            <text:list-item>
              <text:p text:style-name="P20"><text:span text:style-name="T55">cd [folder-name]:</text:span><text:span text:style-name="T52"> Allows you to move into a different folder.</text:span></text:p>
            </text:list-item>
          </text:list>
        </text:list-item>
      </text:list>
      <text:p text:style-name="P15"/>
      <text:p text:style-name="P25">What is development environment?</text:p>
      <text:p text:style-name="P25"/>
      <text:p text:style-name="P18">1. Definition</text:p>
      <text:p text:style-name="P16">A development environment is not a single tool; it is a collection of tools and settings that work together to allow you to write, run, test, and debug your code.</text:p>
      <text:p text:style-name="P16"/>
      <text:p text:style-name="P18">2. The Core Components</text:p>
      <text:p text:style-name="P16">The lecture identifies several essential parts that most developers use:</text:p>
      <text:p text:style-name="P16"/>
      <text:list xml:id="list3811380264" text:style-name="L7">
        <text:list-item>
          <text:p text:style-name="P21"><text:span text:style-name="T56">Code Editor / IDE:</text:span><text:span text:style-name="T53"> The application where you actually write and format your code (e.g., VS Code, PyCharm).</text:span></text:p>
        </text:list-item>
        <text:list-item>
          <text:p text:style-name="P21"><text:span text:style-name="T56">Programming Language &amp; Runtime/Interpreter: </text:span><text:span text:style-name="T53">The language defines the instructions, while the interpreter (like Python) is the engine that actually executes those instructions.</text:span></text:p>
        </text:list-item>
        <text:list-item>
          <text:p text:style-name="P21"><text:span text:style-name="T56">Terminal: </text:span><text:span text:style-name="T53">A text-based interface used to interact with your system, navigate folders, and launch your programs (e.g., python main.py).</text:span></text:p>
        </text:list-item>
        <text:list-item>
          <text:p text:style-name="P21"><text:span text:style-name="T56">Project Files &amp; Folders:</text:span><text:span text:style-name="T53"> Code is organized into files (like main.py) kept within a specific project structure.</text:span></text:p>
        </text:list-item>
        <text:list-item>
          <text:p text:style-name="P21"><text:span text:style-name="T56">Result Output: </text:span><text:span text:style-name="T53">The place where you see the "output" of your code—often the terminal for beginners, or a browser for web projects.</text:span></text:p>
        </text:list-item>
      </text:list>
      <text:p text:style-name="P18"><text:soft-page-break/>3. The Development Cycle</text:p>
      <text:p text:style-name="P16">The lecture emphasizes a simple, recurring workflow: Write → Run → Check → Fix</text:p>
      <text:p text:style-name="P16"/>
      <text:p text:style-name="P26">Variables</text:p>
      <text:p text:style-name="P26"/>
      <text:p text:style-name="P19">1. Variables and Assignment</text:p>
      <text:p text:style-name="P17">When you set x = 42, you are telling Python to associate the value 42 with the name x.</text:p>
      <text:p text:style-name="P17"/>
      <text:p text:style-name="P17"># Storing a number (integer)</text:p>
      <text:p text:style-name="P17">age = 27</text:p>
      <text:p text:style-name="P17"># Storing a text (string)</text:p>
      <text:p text:style-name="P17">cat_name = "Thomas"</text:p>
      <text:p text:style-name="P17"/>
      <text:p text:style-name="P19">2. Using Variable Values in Operations</text:p>
      <text:p text:style-name="P17">Remember that when you perform math, Python reaches into the variable to get the value, not the name itself. The right side of the = is always calculated first.</text:p>
      <text:p text:style-name="P17"/>
      <text:p text:style-name="P17">a = 10</text:p>
      <text:p text:style-name="P17">b = 15</text:p>
      <text:p text:style-name="P17"/>
      <text:p text:style-name="P17"># Python takes 10 and 15, adds them to make 25, then assigns 25 to 'c'</text:p>
      <text:p text:style-name="P17">c = a + b </text:p>
      <text:p text:style-name="P17"/>
      <text:p text:style-name="P19">3. Updating (Overwriting) Values</text:p>
      <text:p text:style-name="P17">Since a variable can only hold one value at a time, assigning something new replaces what was previously there. Think of it like swapping the contents of a drawer.</text:p>
      <text:p text:style-name="P17"/>
      <text:p text:style-name="P17">h = 27</text:p>
      <text:p text:style-name="P17"># Python sees: h = 27 + 1</text:p>
      <text:p text:style-name="P17"># Old value 27 is discarded; h now becomes 28</text:p>
      <text:p text:style-name="P17">h = h + 1 </text:p>
      <text:p text:style-name="P17"/>
      <text:p text:style-name="P19">4. Order of Execution (NameError)</text:p>
      <text:p text:style-name="P17">If you try to use a variable before Python has seen it defined, the program will crash with a NameError.</text:p>
      <text:p text:style-name="P17"/>
      <text:p text:style-name="P17"># This will fail because 'box' hasn't been created yet</text:p>
      <text:p text:style-name="P17">result = box + 5 </text:p>
      <text:p text:style-name="P17"/>
      <text:p text:style-name="P17"># Correct way:</text:p>
      <text:p text:style-name="P17">box = 10</text:p>
      <text:p text:style-name="P17">result = box + 5 <text:s/># This works!</text:p>
      <text:p text:style-name="P17"/>
      <text:p text:style-name="P19">5. Naming Conventions</text:p>
      <text:p text:style-name="P17">Since you cannot have spaces in variable names, we use conventions. Choose one and stick to it for consistency.</text:p>
      <text:p text:style-name="P17"/>
      <text:p text:style-name="P17"># snake_case (using underscores)</text:p>
      <text:p text:style-name="P17">user_age = 25</text:p>
      <text:p text:style-name="P17"/>
      <text:p text:style-name="P17"># camelCase (capitalizing each word except the first)</text:p>
      <text:p text:style-name="P17">userAge = 25</text:p>
      <text:p text:style-name="P26"><text:soft-page-break/>Code structure</text:p>
      <text:p text:style-name="P17"/>
      <text:p text:style-name="P19">Indentation:</text:p>
      <text:p text:style-name="P17"/>
      <text:list xml:id="list2015152513" text:style-name="L8">
        <text:list-item>
          <text:p text:style-name="P22"><text:span text:style-name="T54">Unlike some other programming languages, Python treats whitespace as syntactically significant.</text:span></text:p>
        </text:list-item>
        <text:list-item>
          <text:p text:style-name="P22"><text:span text:style-name="T54">All statements within the same block must have the exact same level of indentation.</text:span></text:p>
        </text:list-item>
        <text:list-item>
          <text:p text:style-name="P22"><text:span text:style-name="T54">If lines of code intended for the same block are indented differently, the Python interpreter will raise an IndentationError, and the code won't execute at all.</text:span></text:p>
        </text:list-item>
      </text:list>
      <text:p text:style-name="P17"/>
      <text:p text:style-name="P19">Comments:</text:p>
      <text:p text:style-name="P17"/>
      <text:list xml:id="list2949594078" text:style-name="L9">
        <text:list-item>
          <text:p text:style-name="P24"><text:span text:style-name="T54">Comments are used to write text that the Python interpreter completely ignores.</text:span></text:p>
        </text:list-item>
        <text:list-item>
          <text:p text:style-name="P24"><text:span text:style-name="T54">They start with the hash symbol (#).</text:span></text:p>
        </text:list-item>
        <text:list-item>
          <text:p text:style-name="P24"><text:span text:style-name="T54">They are primarily used for adding explanations about what the code does, providing warnings to other developers (or your future self), or temporarily disabling specific lines of code to test how the rest of the script performs.</text:span></text:p>
        </text:list-item>
      </text:list>
      <text:p text:style-name="P23"><text:span text:style-name="T54"/></text:p>
      <text:p text:style-name="P27"><text:span text:style-name="T3">D</text:span><text:span text:style-name="T1">ata types</text:span></text:p>
      <text:p text:style-name="P23"><text:span text:style-name="T54"/></text:p>
      <text:list xml:id="list2396690521" text:style-name="L11">
        <text:list-item>
          <text:p text:style-name="P31"><text:span text:style-name="Strong_20_Emphasis"><text:span text:style-name="T38">Understanding Data Types:</text:span></text:span><text:span text:style-name="T39"> Data types are categories for values that allow the program to operate on them correctly. They are essential because the operations you can perform depend on the type of data (e.g., you can perform math on numbers, but not on text).</text:span></text:p>
        </text:list-item>
        <text:list-item>
          <text:p text:style-name="P31"><text:span text:style-name="Strong_20_Emphasis"><text:span text:style-name="T40">Built-in vs. Custom Types:</text:span></text:span><text:span text:style-name="T41"> Python comes with several "built-in" types that are ready to use. While developers can define their own "custom" types for complex tasks, we focus on the foundational built-in types first.</text:span></text:p>
        </text:list-item>
        <text:list-item>
          <text:p text:style-name="P31"><text:span text:style-name="Strong_20_Emphasis"><text:span text:style-name="T40">Core Data Types:</text:span></text:span></text:p>
          <text:list>
            <text:list-item>
              <text:p text:style-name="P31"><text:span text:style-name="Strong_20_Emphasis"><text:span text:style-name="T40">Integers (</text:span></text:span><text:span text:style-name="Strong_20_Emphasis"><text:span text:style-name="Source_20_Text"><text:span text:style-name="T40">int</text:span></text:span></text:span><text:span text:style-name="Strong_20_Emphasis"><text:span text:style-name="T40">):</text:span></text:span><text:span text:style-name="T41"> Represent whole numbers. They can be positive or negative and can grow extremely large depending on your computer's memory. You can use underscores (e.g., </text:span><text:span text:style-name="Source_20_Text"><text:span text:style-name="T41">1_000</text:span></text:span><text:span text:style-name="T41">) to make large numbers easier to read.</text:span></text:p>
            </text:list-item>
            <text:list-item>
              <text:p text:style-name="P31"><text:span text:style-name="Strong_20_Emphasis"><text:span text:style-name="T40">Floats (</text:span></text:span><text:span text:style-name="Strong_20_Emphasis"><text:span text:style-name="Source_20_Text"><text:span text:style-name="T40">float</text:span></text:span></text:span><text:span text:style-name="Strong_20_Emphasis"><text:span text:style-name="T40">):</text:span></text:span><text:span text:style-name="T41"> Represent real numbers with a fractional part, denoted by a decimal point. Note that they have a limit on precision (around 16–17 digits).</text:span></text:p>
            </text:list-item>
            <text:list-item>
              <text:p text:style-name="P31"><text:span text:style-name="Strong_20_Emphasis"><text:span text:style-name="T40">Booleans (</text:span></text:span><text:span text:style-name="Strong_20_Emphasis"><text:span text:style-name="Source_20_Text"><text:span text:style-name="T40">bool</text:span></text:span></text:span><text:span text:style-name="Strong_20_Emphasis"><text:span text:style-name="T40">):</text:span></text:span><text:span text:style-name="T41"> Used for logical checks and flow control. They store only one of two values: </text:span><text:span text:style-name="Source_20_Text"><text:span text:style-name="T41">True</text:span></text:span><text:span text:style-name="T41"> or </text:span><text:span text:style-name="Source_20_Text"><text:span text:style-name="T41">False</text:span></text:span><text:span text:style-name="T41">.</text:span></text:p>
            </text:list-item>
            <text:list-item>
              <text:p text:style-name="P31"><text:span text:style-name="Strong_20_Emphasis"><text:span text:style-name="T40">Strings (</text:span></text:span><text:span text:style-name="Strong_20_Emphasis"><text:span text:style-name="Source_20_Text"><text:span text:style-name="T40">str</text:span></text:span></text:span><text:span text:style-name="Strong_20_Emphasis"><text:span text:style-name="T40">):</text:span></text:span><text:span text:style-name="T41"> Used to store text. They can be defined with single (</text:span><text:span text:style-name="Source_20_Text"><text:span text:style-name="T41">'</text:span></text:span><text:span text:style-name="T41">) or double (</text:span><text:span text:style-name="Source_20_Text"><text:span text:style-name="T41">"</text:span></text:span><text:span text:style-name="T41">) quotes. Multiline text can be handled using triple quotes (</text:span><text:span text:style-name="Source_20_Text"><text:span text:style-name="T41">'''</text:span></text:span><text:span text:style-name="T41"> or </text:span><text:span text:style-name="Source_20_Text"><text:span text:style-name="T41">"""</text:span></text:span><text:span text:style-name="T41">).</text:span></text:p>
            </text:list-item>
            <text:list-item>
              <text:p text:style-name="P31"><text:span text:style-name="Strong_20_Emphasis"><text:span text:style-name="T40">None Type:</text:span></text:span><text:span text:style-name="T41"> A special type used to represent the absence of a value, which is very useful when program logic requires a placeholder for missing information.</text:span></text:p>
            </text:list-item>
          </text:list>
        </text:list-item>
      </text:list>
      <text:p text:style-name="P37"><text:span text:style-name="T43">Operators</text:span></text:p>
      <text:list xml:id="list2536644284" text:style-name="L13">
        <text:list-item>
          <text:p text:style-name="P32"><text:span text:style-name="Strong_20_Emphasis"><text:span text:style-name="T49">Understanding Operators:</text:span></text:span><text:span text:style-name="T50"> Operators are special symbols that perform operations on values (called operands). They are used to create expressions.</text:span></text:p>
        </text:list-item>
        <text:list-item>
          <text:p text:style-name="P32"><text:soft-page-break/><text:span text:style-name="Strong_20_Emphasis"><text:span text:style-name="T47">Mathematical Operators:</text:span></text:span><text:span text:style-name="T48"> These include standard arithmetic operations (+, -, *, /) and specific ones like floor division (</text:span><text:span text:style-name="Source_20_Text"><text:span text:style-name="T48">//</text:span></text:span><text:span text:style-name="T48">), which rounds down to the nearest whole number, and the modulo operator (</text:span><text:span text:style-name="Source_20_Text"><text:span text:style-name="T48">%</text:span></text:span><text:span text:style-name="T48">), which returns the remainder of a division.</text:span></text:p>
        </text:list-item>
        <text:list-item>
          <text:p text:style-name="P32"><text:span text:style-name="Strong_20_Emphasis"><text:span text:style-name="T47">Operator Precedence:</text:span></text:span><text:span text:style-name="T48"> When multiple operators appear in an expression, Python follows specific rules of precedence (similar to math). You can override this order by using parentheses.</text:span></text:p>
        </text:list-item>
        <text:list-item>
          <text:p text:style-name="P32"><text:span text:style-name="Strong_20_Emphasis"><text:span text:style-name="T47">Assignment Operators:</text:span></text:span><text:span text:style-name="T48"> The basic assignment operator (</text:span><text:span text:style-name="Source_20_Text"><text:span text:style-name="T48">=</text:span></text:span><text:span text:style-name="T48">) stores a value in a variable. It is important to remember that the expression on the right side is always evaluated before the value is assigned to the variable on the left.</text:span></text:p>
        </text:list-item>
        <text:list-item>
          <text:p text:style-name="P32"><text:span text:style-name="Strong_20_Emphasis"><text:span text:style-name="T47">Shorthand Assignments:</text:span></text:span><text:span text:style-name="T48"> These offer a more concise way to update the value of an existing variable (e.g., </text:span><text:span text:style-name="Source_20_Text"><text:span text:style-name="T48">x += 5</text:span></text:span><text:span text:style-name="T48"> instead of </text:span><text:span text:style-name="Source_20_Text"><text:span text:style-name="T48">x = x + 5</text:span></text:span><text:span text:style-name="T48">).</text:span></text:p>
        </text:list-item>
      </text:list>
      <text:p text:style-name="P33"><text:span text:style-name="T48"/></text:p>
      <text:p text:style-name="P34"><text:span text:style-name="Strong_20_Emphasis"><text:span text:style-name="T29">What are Functions?</text:span></text:span><text:span text:style-name="T29"> </text:span></text:p>
      <text:p text:style-name="P34"><text:span text:style-name="T15">Think of them as "mini-programs" within your main code. They are groups of instructions bundled together to perform a specific task, allowing you to reuse that logic multiple times without rewriting the code.</text:span></text:p>
      <text:list xml:id="list3244548214" text:style-name="L15">
        <text:list-item>
          <text:p text:style-name="P28"><text:span text:style-name="Strong_20_Emphasis"><text:span text:style-name="T14">Structure:</text:span></text:span><text:span text:style-name="T15"> A function typically takes input (called </text:span><text:span text:style-name="Strong_20_Emphasis"><text:span text:style-name="T14">arguments</text:span></text:span><text:span text:style-name="T15">) and returns an output.</text:span></text:p>
        </text:list-item>
        <text:list-item>
          <text:p text:style-name="P28"><text:span text:style-name="Strong_20_Emphasis"><text:span text:style-name="T14">How to "Call" a Function:</text:span></text:span><text:span text:style-name="T15"> You trigger a function by using its name followed immediately by parentheses </text:span><text:span text:style-name="Source_20_Text"><text:span text:style-name="T36">()</text:span></text:span><text:span text:style-name="T15">. Even if a function takes no arguments, the parentheses are mandatory—without them, the function will not execute.</text:span></text:p>
        </text:list-item>
        <text:list-item>
          <text:p text:style-name="P28"><text:span text:style-name="Strong_20_Emphasis"><text:span text:style-name="T14">Multiple Arguments:</text:span></text:span><text:span text:style-name="T15"> Some functions can accept more than one input. When they do, you simply separate the arguments within the parentheses using commas (e.g., </text:span><text:span text:style-name="Source_20_Text"><text:span text:style-name="T36">max(10, 20)</text:span></text:span><text:span text:style-name="T15">).</text:span></text:p>
        </text:list-item>
        <text:list-item>
          <text:p text:style-name="P28"><text:span text:style-name="Strong_20_Emphasis"><text:span text:style-name="T14">Built-in Functions:</text:span></text:span><text:span text:style-name="T15"> Python comes with many pre-made functions ready to use, such as </text:span><text:span text:style-name="Source_20_Text"><text:span text:style-name="T36">print()</text:span></text:span><text:span text:style-name="T15"> (to display text/data), </text:span><text:span text:style-name="Source_20_Text"><text:span text:style-name="T36">round()</text:span></text:span><text:span text:style-name="T15"> (to round numbers), and </text:span><text:span text:style-name="Source_20_Text"><text:span text:style-name="T36">max()</text:span></text:span><text:span text:style-name="T15"> (to find the largest value).</text:span></text:p>
        </text:list-item>
      </text:list>
      <text:p text:style-name="P38"><text:span text:style-name="T22">Strings</text:span></text:p>
      <text:p text:style-name="P41"><text:span text:style-name="Strong_20_Emphasis"><text:span text:style-name="T23">Understanding Strings:</text:span></text:span><text:span text:style-name="T24"> A string is a sequence of characters where each character has a specific index (starting from 0). You can check the length of a string using the </text:span><text:span text:style-name="Source_20_Text"><text:span text:style-name="T34">len()</text:span></text:span><text:span text:style-name="T24"> function.</text:span></text:p>
      <text:list xml:id="list2765539072" text:style-name="L17">
        <text:list-item>
          <text:p text:style-name="P29"><text:span text:style-name="Strong_20_Emphasis"><text:span text:style-name="T14">Character Codes:</text:span></text:span><text:span text:style-name="T15"> Computers store characters as numerical codes (such as ASCII). You can convert a character to its code using </text:span><text:span text:style-name="Source_20_Text"><text:span text:style-name="T36">ord()</text:span></text:span><text:span text:style-name="T15"> and convert a code back into its character equivalent using </text:span><text:span text:style-name="Source_20_Text"><text:span text:style-name="T36">chr()</text:span></text:span><text:span text:style-name="T15">.</text:span></text:p>
        </text:list-item>
        <text:list-item>
          <text:p text:style-name="P29"><text:soft-page-break/><text:span text:style-name="Strong_20_Emphasis"><text:span text:style-name="T14">String Slicing:</text:span></text:span><text:span text:style-name="T15"> You can extract parts of a string using the </text:span><text:span text:style-name="Source_20_Text"><text:span text:style-name="T36">[start_index:end_index]</text:span></text:span><text:span text:style-name="T15"> syntax. Remember that the start index is included, but the end index is excluded. This operation creates a new string and does not modify the original.</text:span></text:p>
        </text:list-item>
        <text:list-item>
          <text:p text:style-name="P29"><text:span text:style-name="Strong_20_Emphasis"><text:span text:style-name="T14">String Formatting:</text:span></text:span><text:span text:style-name="T15"> This allows you to create dynamic text by inserting variables into a template:</text:span></text:p>
        </text:list-item>
        <text:list-item>
          <text:p text:style-name="P29"><text:span text:style-name="Strong_20_Emphasis"><text:span text:style-name="T14">The </text:span></text:span><text:span text:style-name="Strong_20_Emphasis"><text:span text:style-name="Source_20_Text"><text:span text:style-name="T37">format()</text:span></text:span></text:span><text:span text:style-name="Strong_20_Emphasis"><text:span text:style-name="T14"> method:</text:span></text:span><text:span text:style-name="T15"> Uses curly braces </text:span><text:span text:style-name="Source_20_Text"><text:span text:style-name="T36">{}</text:span></text:span><text:span text:style-name="T15"> as placeholders in a string, which are then replaced by the values passed into the method.</text:span></text:p>
        </text:list-item>
        <text:list-item>
          <text:p text:style-name="P29"><text:span text:style-name="Strong_20_Emphasis"><text:span text:style-name="T14">f-strings:</text:span></text:span><text:span text:style-name="T15"> A more modern and streamlined approach where you prefix the string with </text:span><text:span text:style-name="Source_20_Text"><text:span text:style-name="T36">f</text:span></text:span><text:span text:style-name="T15"> and place variables directly inside the </text:span><text:span text:style-name="Source_20_Text"><text:span text:style-name="T36">{}</text:span></text:span><text:span text:style-name="T15"> placeholders.</text:span></text:p>
        </text:list-item>
      </text:list>
      <text:p text:style-name="P36"><text:span text:style-name="T41"/></text:p>
      <text:p text:style-name="P39"><text:span text:style-name="T43">Input</text:span></text:p>
      <text:list xml:id="list1477687708" text:style-name="L19">
        <text:list-item>
          <text:p text:style-name="P42"><text:span text:style-name="Strong_20_Emphasis"><text:span text:style-name="T17">Understanding the Console:</text:span></text:span><text:span text:style-name="T19"> We look at what the console (or terminal) is—a basic tool for interacting with the operating system—and how it serves as a way to execute Python scripts.</text:span></text:p>
        </text:list-item>
        <text:list-item>
          <text:p text:style-name="P42"><text:span text:style-name="Strong_20_Emphasis"><text:span text:style-name="T14">Executing Python Scripts:</text:span></text:span><text:span text:style-name="T15"> You learn how to run a Python file (e.g., </text:span><text:span text:style-name="Source_20_Text"><text:span text:style-name="T36">main.py</text:span></text:span><text:span text:style-name="T15">) directly from the console by navigating to the file's folder and using the command </text:span><text:span text:style-name="Source_20_Text"><text:span text:style-name="T36">python main.py</text:span></text:span><text:span text:style-name="T15">.</text:span></text:p>
        </text:list-item>
        <text:list-item>
          <text:p text:style-name="P42"><text:span text:style-name="Strong_20_Emphasis"><text:span text:style-name="T14">Console Output:</text:span></text:span><text:span text:style-name="T15"> We cover the </text:span><text:span text:style-name="Source_20_Text"><text:span text:style-name="T36">print()</text:span></text:span><text:span text:style-name="T15"> function, which allows a program to display information to the user. Each </text:span><text:span text:style-name="Source_20_Text"><text:span text:style-name="T36">print</text:span></text:span><text:span text:style-name="T15"> statement typically adds a new line in the console, and it can handle both text and the results of mathematical expressions.</text:span></text:p>
        </text:list-item>
        <text:list-item>
          <text:p text:style-name="P42"><text:span text:style-name="Strong_20_Emphasis"><text:span text:style-name="T14">Console Input:</text:span></text:span><text:span text:style-name="T15"> We introduce the </text:span><text:span text:style-name="Source_20_Text"><text:span text:style-name="T36">input()</text:span></text:span><text:span text:style-name="T15"> function, which allows a program to receive data from the user. It is a "blocking" instruction, meaning the program pauses and waits for the user to type something and press Enter before moving to the next line of code.</text:span></text:p>
        </text:list-item>
      </text:list>
      <text:p text:style-name="P40"><text:span text:style-name="T43">Parsing</text:span></text:p>
      <text:list xml:id="list1507623159" text:style-name="L22">
        <text:list-item>
          <text:p text:style-name="P35"><text:span text:style-name="Strong_20_Emphasis"><text:span text:style-name="T18">What is Parsing?</text:span></text:span><text:span text:style-name="T20"> It is the process of converting data from one type (typically a string) into a more specialized type, such as an integer or a floating-point number.</text:span></text:p>
        </text:list-item>
      </text:list>
      <text:list xml:id="list4247229202" text:style-name="L21">
        <text:list-item>
          <text:p text:style-name="P30"><text:span text:style-name="Strong_20_Emphasis"><text:span text:style-name="T14">Why is it necessary?</text:span></text:span><text:span text:style-name="T15"> In Python, the way operators behave depends on the data type. For example, the </text:span><text:span text:style-name="Source_20_Text"><text:span text:style-name="T36">+</text:span></text:span><text:span text:style-name="T15"> operator performs </text:span><text:span text:style-name="Emphasis"><text:span text:style-name="T21">concatenation</text:span></text:span><text:span text:style-name="T15"> (joining text) on strings, but perform </text:span><text:span text:style-name="Emphasis"><text:span text:style-name="T21">arithmetic addition</text:span></text:span><text:span text:style-name="T15"> on numbers. Since the </text:span><text:span text:style-name="Source_20_Text"><text:span text:style-name="T36">input()</text:span></text:span><text:span text:style-name="T15"> function always returns a string, you must parse that input if you intend to perform calculations.</text:span></text:p>
        </text:list-item>
        <text:list-item>
          <text:p text:style-name="P30"><text:span text:style-name="Strong_20_Emphasis"><text:span text:style-name="T14">Built-in Functions:</text:span></text:span><text:span text:style-name="T15"> Python provides two main functions for this:</text:span></text:p>
        </text:list-item>
        <text:list-item>
          <text:p text:style-name="P30"><text:span text:style-name="Source_20_Text"><text:span text:style-name="T36">int()</text:span></text:span><text:span text:style-name="T15">: Converts valid strings into integers.</text:span></text:p>
        </text:list-item>
        <text:list-item>
          <text:p text:style-name="P30"><text:soft-page-break/><text:span text:style-name="Source_20_Text"><text:span text:style-name="T36">float()</text:span></text:span><text:span text:style-name="T15">: Converts valid strings into floating-point numbers (decimals).</text:span></text:p>
        </text:list-item>
        <text:list-item>
          <text:p text:style-name="P30"><text:span text:style-name="Strong_20_Emphasis"><text:span text:style-name="T14">Important Constraints:</text:span></text:span><text:span text:style-name="T15"> Not every string can be parsed into a number. If you attempt to parse a string that contains invalid characters (like letters or symbols not related to the number format), Python will raise a </text:span><text:span text:style-name="Source_20_Text"><text:span text:style-name="T36">ValueError</text:span></text:span><text:span text:style-name="T15">. For example, trying to convert </text:span><text:span text:style-name="Source_20_Text"><text:span text:style-name="T36">"2.5"</text:span></text:span><text:span text:style-name="T15"> into an integer using </text:span><text:span text:style-name="Source_20_Text"><text:span text:style-name="T36">int()</text:span></text:span><text:span text:style-name="T15"> will cause an error because the decimal point is not part of an integer.</text:span></text:p>
        </text:list-item>
      </text:list>
      <text:p text:style-name="P23"><text:span text:style-name="T5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Code" svg:font-family="'Cascadia Code', 'Fira Code', 'JetBrains Mono', monospace"/>
    <style:font-face style:name="Inter" svg:font-family="Inter, system-ui, apple-system, sans-serif"/>
    <style:font-face style:name="Lebration serif" svg:font-family="'Lebra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Liberian serif" svg:font-family="'Liberian serif'"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oppins" svg:font-family="Poppins, Montserrat, sans-serif"/>
    <style:font-face style:name="source-code-pro" svg:font-family="source-code-pro, Menlo, Monaco,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06T15:48:37.866000000</meta:creation-date>
    <dc:date>2026-06-28T16:33:41.997000000</dc:date>
    <meta:editing-duration>PT2H23M</meta:editing-duration>
    <meta:editing-cycles>12</meta:editing-cycles>
    <meta:generator>LibreOffice/7.3.4.2$Windows_X86_64 LibreOffice_project/728fec16bd5f605073805c3c9e7c4212a0120dc5</meta:generator>
    <meta:document-statistic meta:table-count="0" meta:image-count="0" meta:object-count="0" meta:page-count="7" meta:paragraph-count="130" meta:word-count="2209" meta:character-count="13159" meta:non-whitespace-character-count="11146"/>
  </office:meta>
</office:document-meta>
</file>