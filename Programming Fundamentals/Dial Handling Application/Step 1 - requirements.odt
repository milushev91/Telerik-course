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A000003085BF3A1764BC5CF8D.png" manifest:media-type="image/png"/>
  <manifest:file-entry manifest:full-path="Pictures/10000001000006C000000088F211A3DEB830F08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Montserrat, sans-serif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7.59cm" draw:z-index="0"><draw:image xlink:href="Pictures/10000001000006CA000003085BF3A1764BC5CF8D.png" xlink:type="simple" xlink:show="embed" xlink:actuate="onLoad" draw:mime-type="image/png"/></draw:frame><draw:frame draw:style-name="fr1" draw:name="Image2" text:anchor-type="char" svg:x="-0.247cm" svg:y="7.92cm" svg:width="17cm" svg:height="1.337cm" draw:z-index="1"><draw:image xlink:href="Pictures/10000001000006C000000088F211A3DEB830F0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Montserrat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8T16:29:11.114000000</meta:creation-date>
    <dc:date>2026-06-28T16:32:15.386000000</dc:date>
    <meta:editing-duration>PT3M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