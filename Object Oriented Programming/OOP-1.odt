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SF Pro Display', apple-system, BlinkMacSystemFont, 'Open Sans'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oppins" svg:font-family="Poppins, Montserrat, sans-serif"/>
    <style:font-face style:name="monospace" svg:font-family="monospace"/>
    <style:font-face style:name="source-code-pro" svg:font-family="source-code-pro, Menlo, Monaco, Consolas, 'Courier New', monospac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82cm"/>
    </style:style>
    <style:style style:name="Table1.B" style:family="table-column">
      <style:table-column-properties style:column-width="14.118cm"/>
    </style:style>
    <style:style style:name="Table1.A1" style:family="table-cell">
      <style:table-cell-properties style:vertical-align="middle" fo:padding-left="0.318cm" fo:padding-right="0.318cm" fo:padding-top="0.169cm" fo:padding-bottom="0.169cm" fo:border="0.05pt solid #d0d5dd"/>
    </style:style>
    <style:style style:name="Table1.2" style:family="table-row">
      <style:table-row-properties fo:background-color="#f9fafb">
        <style:background-image/>
      </style:table-row-properties>
    </style:style>
    <style:style style:name="P1" style:family="paragraph" style:parent-style-name="Heading_20_1">
      <style:text-properties fo:font-variant="normal" fo:text-transform="none" fo:color="#101828" loext:opacity="100%" style:font-name="Poppins" fo:font-size="36pt" fo:letter-spacing="normal" fo:language="en" fo:country="US" fo:font-style="normal" fo:font-weight="bold" officeooo:rsid="00190cb1" officeooo:paragraph-rsid="00190cb1" loext:padding="0cm" loext:border="none"/>
    </style:style>
    <style:style style:name="P2" style:family="paragraph" style:parent-style-name="Heading_20_2">
      <style:text-properties fo:font-variant="normal" fo:text-transform="none" fo:color="#101828" loext:opacity="100%" style:font-name="Poppins" fo:font-size="28.7999992370605pt" fo:letter-spacing="normal" fo:language="en" fo:country="US" fo:font-style="normal" fo:font-weight="bold" officeooo:rsid="00190cb1" officeooo:paragraph-rsid="00190cb1" loext:padding="0cm" loext:border="none"/>
    </style:style>
    <style:style style:name="P3" style:family="paragraph" style:parent-style-name="Heading_20_2">
      <style:text-properties fo:font-variant="normal" fo:text-transform="none" fo:color="#101828" loext:opacity="100%" style:font-name="Poppins" fo:font-size="18pt" fo:letter-spacing="normal" fo:language="en" fo:country="US" fo:font-style="normal" fo:font-weight="bold" officeooo:rsid="00190cb1" officeooo:paragraph-rsid="00190cb1" style:font-size-asian="18pt" style:font-size-complex="18pt" loext:padding="0cm" loext:border="none"/>
    </style:style>
    <style:style style:name="P4" style:family="paragraph" style:parent-style-name="Heading_20_2">
      <style:text-properties fo:font-variant="normal" fo:text-transform="none" fo:color="#101828" loext:opacity="100%" style:font-name="Poppins" fo:font-size="25.2000007629395pt" fo:letter-spacing="normal" fo:language="en" fo:country="US" fo:font-style="normal" fo:font-weight="bold" officeooo:rsid="00190cb1" officeooo:paragraph-rsid="00190cb1" loext:padding="0cm" loext:border="none"/>
    </style:style>
    <style:style style:name="P5" style:family="paragraph" style:parent-style-name="Heading_20_2">
      <style:paragraph-properties fo:margin-top="0cm" fo:margin-bottom="0cm" style:contextual-spacing="false" fo:line-height="150%" fo:orphans="2" fo:widows="2" fo:padding="0cm" fo:border="none"/>
    </style:style>
    <style:style style:name="P6" style:family="paragraph" style:parent-style-name="Heading_20_2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</style:style>
    <style:style style:name="P7" style:family="paragraph" style:parent-style-name="Heading_20_3">
      <style:paragraph-properties fo:margin-top="0cm" fo:margin-bottom="0cm" style:contextual-spacing="false" fo:line-height="150%" fo:orphans="2" fo:widows="2" fo:padding="0cm" fo:border="none"/>
    </style:style>
    <style:style style:name="P8" style:family="paragraph" style:parent-style-name="Heading_20_3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</style:style>
    <style:style style:name="P9" style:family="paragraph" style:parent-style-name="Heading_20_3">
      <style:paragraph-properties fo:margin-left="0cm" fo:margin-right="0cm" fo:margin-top="0cm" fo:margin-bottom="0cm" style:contextual-spacing="false" style:line-height-at-least="1.016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24pt" fo:letter-spacing="normal" fo:font-style="normal" fo:font-weight="bold" loext:padding="0cm" loext:border="none"/>
    </style:style>
    <style:style style:name="P10" style:family="paragraph" style:parent-style-name="Heading_20_3">
      <style:paragraph-properties fo:margin-left="0cm" fo:margin-right="0cm" fo:margin-top="0cm" fo:margin-bottom="0cm" style:contextual-spacing="false" style:line-height-at-least="0.889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20.3999996185303pt" fo:letter-spacing="normal" fo:font-style="normal" fo:font-weight="bold" loext:padding="0cm" loext:border="non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50%" fo:text-indent="0cm" style:auto-text-indent="false" fo:padding="0cm" fo:border="none"/>
    </style:style>
    <style:style style:name="P12" style:family="paragraph" style:parent-style-name="Preformatted_20_Text">
      <style:paragraph-properties fo:margin-top="0cm" fo:margin-bottom="0cm" style:contextual-spacing="false" fo:line-height="150%" fo:padding="0cm" fo:border="non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4" style:family="paragraph" style:parent-style-name="Preformatted_20_Text">
      <style:paragraph-properties fo:margin-top="0cm" fo:margin-bottom="0cm" style:contextual-spacing="false" fo:line-height="150%" fo:orphans="2" fo:widows="2" fo:padding="0cm" fo:border="none"/>
    </style:style>
    <style:style style:name="P15" style:family="paragraph" style:parent-style-name="Preformatted_20_Text">
      <style:paragraph-properties fo:margin-top="0cm" fo:margin-bottom="0cm" style:contextual-spacing="false" fo:line-height="150%" fo:orphans="2" fo:widows="2" fo:padding="0cm" fo:border="none"/>
      <style:text-properties officeooo:paragraph-rsid="00190cb1"/>
    </style:style>
    <style:style style:name="P16" style:family="paragraph" style:parent-style-name="Standard">
      <style:text-properties fo:language="en" fo:country="US" officeooo:rsid="00190cb1" officeooo:paragraph-rsid="00190cb1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style:line-height-at-least="0.55cm" fo:text-indent="0cm" style:auto-text-indent="false" fo:padding="0cm" fo:border="none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style:line-height-at-least="0.55cm" fo:text-indent="0cm" style:auto-text-indent="false" fo:padding="0cm" fo:border="none"/>
      <style:text-properties fo:color="#101828" loext:opacity="100%" style:font-name="Poppins" fo:font-size="12pt" fo:font-weight="normal"/>
    </style:style>
    <style:style style:name="P19" style:family="paragraph" style:parent-style-name="Table_20_Heading">
      <style:paragraph-properties fo:margin-left="0cm" fo:margin-right="0cm" fo:margin-top="0cm" fo:margin-bottom="0cm" style:contextual-spacing="false" style:line-height-at-least="0.55cm" fo:text-align="start" style:justify-single-word="false" fo:text-indent="0cm" style:auto-text-indent="false" fo:padding="0cm" fo:border="none"/>
      <style:text-properties fo:color="#101828" loext:opacity="100%" style:font-name="Poppins" fo:font-size="12pt" style:text-underline-style="solid" style:text-underline-width="auto" style:text-underline-color="font-color" fo:font-weight="normal"/>
    </style:style>
    <style:style style:name="P20" style:family="paragraph" style:parent-style-name="Text_20_body">
      <style:paragraph-properties fo:margin-left="0cm" fo:margin-right="0cm" fo:margin-top="0cm" fo:margin-bottom="0.254cm" style:contextual-spacing="false" fo:line-height="150%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style:line-height-at-least="0.55cm" fo:text-indent="0cm" style:auto-text-indent="false" fo:padding="0cm" fo:border="none"/>
      <style:text-properties fo:color="#101828" loext:opacity="100%" style:font-name="Poppins" fo:font-size="12pt" fo:font-weight="normal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style:line-height-at-least="0.55cm" fo:text-indent="0cm" style:auto-text-indent="false" fo:padding="0cm" fo:border="none"/>
      <style:text-properties fo:color="#101828" loext:opacity="100%" fo:font-size="12pt" fo:background-color="#f2f4f7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3.1999998092651pt" fo:letter-spacing="normal" fo:font-style="normal" fo:font-weight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style:line-height-at-least="0.55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 loext:padding="0cm" loext:border="none"/>
    </style:style>
    <style:style style:name="P26" style:family="paragraph" style:parent-style-name="Text_20_body">
      <style:paragraph-properties fo:margin-left="0cm" fo:margin-right="0cm" fo:margin-top="0.254cm" fo:margin-bottom="0.254cm" style:contextual-spacing="false" fo:line-height="150%" fo:orphans="2" fo:widows="2" fo:text-indent="0cm" style:auto-text-indent="false"/>
      <style:text-properties fo:font-variant="normal" fo:text-transform="none" fo:color="#101828" loext:opacity="100%" style:font-name="Poppins" fo:font-size="12pt" fo:letter-spacing="normal" fo:font-style="normal" fo:font-weight="normal" fo:background-color="#f2f4f7" loext:padding="0cm" loext:border="none"/>
    </style:style>
    <style:style style:name="P27" style:family="paragraph" style:parent-style-name="Text_20_body">
      <style:paragraph-properties fo:margin-left="0cm" fo:margin-right="0cm" fo:margin-top="0cm" fo:margin-bottom="0.254cm" style:contextual-spacing="false" fo:line-height="150%" fo:orphans="2" fo:widows="2" fo:text-indent="0cm" style:auto-text-indent="false"/>
      <style:text-properties fo:font-variant="normal" fo:text-transform="none" fo:color="#101828" loext:opacity="100%" style:font-name="Poppins" fo:font-size="12pt" fo:letter-spacing="normal" fo:font-style="normal" fo:font-weight="normal" fo:background-color="#f2f4f7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 fo:background-color="#f2f4f7" loext:padding="0cm" loext:border="none"/>
    </style:style>
    <style:style style:name="P29" style:family="paragraph" style:parent-style-name="Text_20_body">
      <style:paragraph-properties fo:margin-left="0cm" fo:margin-right="0cm" fo:margin-top="0.254cm" fo:margin-bottom="0.254cm" style:contextual-spacing="false" fo:line-height="150%" fo:orphans="2" fo:widows="2" fo:text-indent="0cm" style:auto-text-indent="false"/>
      <style:text-properties fo:font-variant="normal" fo:text-transform="none" fo:color="#101828" loext:opacity="100%" style:font-name="Inter" fo:font-size="12pt" fo:letter-spacing="normal" fo:font-style="normal" fo:font-weight="normal" fo:background-color="#f2f4f7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style:line-height-at-least="0.55cm" fo:text-indent="0cm" style:auto-text-indent="false" fo:padding="0cm" fo:border="none"/>
    </style:style>
    <style:style style:name="P31" style:family="paragraph" style:parent-style-name="Text_20_body">
      <style:paragraph-properties fo:margin-left="0cm" fo:margin-right="0cm" fo:margin-top="0cm" fo:margin-bottom="0cm" style:contextual-spacing="false" style:line-height-at-least="0.55cm" fo:orphans="2" fo:widows="2" fo:text-indent="0cm" style:auto-text-indent="false" fo:padding="0cm" fo:border="none"/>
    </style:style>
    <style:style style:name="T1" style:family="text">
      <style:text-properties fo:color="#101828" loext:opacity="100%" style:font-name="Poppins" fo:font-size="12pt" fo:font-weight="normal"/>
    </style:style>
    <style:style style:name="T2" style:family="text">
      <style:text-properties fo:color="#101828" loext:opacity="100%" style:font-name="Poppins" fo:font-size="12pt" fo:font-weight="normal" loext:padding="0cm" loext:border="none"/>
    </style:style>
    <style:style style:name="T3" style:family="text">
      <style:text-properties fo:color="#101828" loext:opacity="100%" style:font-name="source-code-pro" fo:font-size="12pt" fo:background-color="#f2f4f7" loext:char-shading-value="0" loext:padding="0cm" loext:border="none"/>
    </style:style>
    <style:style style:name="T4" style:family="text">
      <style:text-properties fo:color="#101828" loext:opacity="100%" style:font-name="monospace" fo:font-size="12pt" fo:font-weight="normal" loext:padding="0cm" loext:border="none"/>
    </style:style>
    <style:style style:name="T5" style:family="text">
      <style:text-properties fo:color="#101828" loext:opacity="100%" fo:background-color="#f2f4f7" loext:char-shading-value="0" loext:padding="0cm" loext:border="none"/>
    </style:style>
    <style:style style:name="T6" style:family="text">
      <style:text-properties fo:font-variant="normal" fo:text-transform="none" fo:color="#101828" loext:opacity="100%" style:font-name="Poppins" fo:font-size="13.1999998092651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01828" loext:opacity="100%" style:font-name="Poppins" fo:font-size="24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101828" loext:opacity="100%" style:font-name="Poppins" fo:font-size="28.799999237060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101828" loext:opacity="100%" style:font-name="Poppin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101828" loext:opacity="100%" style:font-name="Poppins" fo:font-size="12pt" fo:letter-spacing="normal" fo:font-style="normal" fo:font-weight="normal" fo:background-color="#f2f4f7" loext:char-shading-value="0" loext:padding="0cm" loext:border="none"/>
    </style:style>
    <style:style style:name="T11" style:family="text">
      <style:text-properties fo:font-variant="normal" fo:text-transform="none" fo:color="#101828" loext:opacity="100%" style:font-name="Poppins" fo:font-size="25.2000007629395pt" fo:letter-spacing="normal" fo:font-style="normal" fo:font-weight="bold" fo:background-color="#f2f4f7" loext:char-shading-value="0" loext:padding="0cm" loext:border="none"/>
    </style:style>
    <style:style style:name="T12" style:family="text">
      <style:text-properties fo:font-variant="normal" fo:text-transform="none" fo:color="#101828" loext:opacity="100%" style:font-name="Poppins" fo:font-size="20.3999996185303pt" fo:letter-spacing="normal" fo:font-style="normal" fo:font-weight="bold" fo:background-color="#f2f4f7" loext:char-shading-value="0" loext:padding="0cm" loext:border="none"/>
    </style:style>
    <style:style style:name="T13" style:family="text">
      <style:text-properties fo:font-variant="normal" fo:text-transform="none" fo:color="#101828" loext:opacity="100%" fo:letter-spacing="normal" loext:padding="0cm" loext:border="none"/>
    </style:style>
    <style:style style:name="T14" style:family="text">
      <style:text-properties fo:font-variant="normal" fo:text-transform="none" fo:color="#101828" loext:opacity="100%" fo:letter-spacing="normal" fo:background-color="#f2f4f7" loext:char-shading-value="0" loext:padding="0cm" loext:border="none"/>
    </style:style>
    <style:style style:name="T15" style:family="text">
      <style:text-properties fo:font-variant="normal" fo:text-transform="none" fo:color="#101828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6" style:family="text">
      <style:text-properties fo:font-variant="normal" fo:text-transform="none" fo:color="#101828" loext:opacity="100%" style:font-name="monospace" fo:font-size="13.1999998092651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101828" loext:opacity="100%" style:font-name="monospace" fo:font-size="12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986801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9" style:family="text">
      <style:text-properties fo:font-variant="normal" fo:text-transform="none" fo:color="#c18401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20" style:family="text">
      <style:text-properties fo:font-variant="normal" fo:text-transform="none" fo:color="#a0a1a7" loext:opacity="100%" style:font-name="source-code-pro" fo:font-size="12pt" fo:letter-spacing="normal" fo:font-style="italic" fo:font-weight="normal" fo:background-color="#f2f4f7" loext:char-shading-value="0" loext:padding="0cm" loext:border="none"/>
    </style:style>
    <style:style style:name="T21" style:family="text">
      <style:text-properties fo:font-variant="normal" fo:text-transform="none" fo:color="#a626a4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22" style:family="text">
      <style:text-properties fo:font-variant="normal" fo:text-transform="none" fo:color="#4078f2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23" style:family="text">
      <style:text-properties fo:font-variant="normal" fo:text-transform="none" fo:color="#4078f2" loext:opacity="100%" fo:letter-spacing="normal" fo:background-color="#f2f4f7" loext:char-shading-value="0" loext:padding="0cm" loext:border="none"/>
    </style:style>
    <style:style style:name="T24" style:family="text">
      <style:text-properties fo:font-variant="normal" fo:text-transform="none" fo:color="#50a14f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25" style:family="text">
      <style:text-properties fo:font-variant="normal" fo:text-transform="none" fo:color="#0184bb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986801" loext:opacity="100%" style:font-name="source-code-pro" fo:font-size="12pt" fo:background-color="#f2f4f7" loext:char-shading-value="0" loext:padding="0cm" loext:border="none"/>
    </style:style>
    <style:style style:name="T28" style:family="text">
      <style:text-properties fo:color="#c18401" loext:opacity="100%" style:font-name="source-code-pro" fo:font-size="12pt" fo:background-color="#f2f4f7" loext:char-shading-value="0" loext:padding="0cm" loext:border="none"/>
    </style:style>
    <style:style style:name="T29" style:family="text">
      <style:text-properties fo:color="#a626a4" loext:opacity="100%" style:font-name="source-code-pro" fo:font-size="12pt" fo:background-color="#f2f4f7" loext:char-shading-value="0" loext:padding="0cm" loext:border="none"/>
    </style:style>
    <style:style style:name="T30" style:family="text">
      <style:text-properties fo:color="#4078f2" loext:opacity="100%" style:font-name="source-code-pro" fo:font-size="12pt" fo:background-color="#f2f4f7" loext:char-shading-value="0" loext:padding="0cm" loext:border="none"/>
    </style:style>
    <style:style style:name="T31" style:family="text">
      <style:text-properties fo:color="#50a14f" loext:opacity="100%" style:font-name="source-code-pro" fo:font-size="12pt" fo:background-color="#f2f4f7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What is OOP</text:h>
      <text:h text:style-name="P3" text:outline-level="2">OOP Definition</text:h>
      <text:p text:style-name="P21"><text:span text:style-name="T13">“</text:span><text:span text:style-name="T6">Object-oriented programming (OOP) is a programming paradigm based on the concept of </text:span><text:span text:style-name="Strong_20_Emphasis"><text:span text:style-name="T6">objects</text:span></text:span><text:span text:style-name="T6">, which may contain data, in the form of fields, often known as </text:span><text:span text:style-name="Strong_20_Emphasis"><text:span text:style-name="T6">attributes</text:span></text:span><text:span text:style-name="T6">; and code, in the form of procedures, often known as </text:span><text:span text:style-name="Strong_20_Emphasis"><text:span text:style-name="T6">methods</text:span></text:span><text:span text:style-name="T6">.” — </text:span><text:span text:style-name="Emphasis"><text:span text:style-name="T6">Wikipedia</text:span></text:span></text:p>
      <text:h text:style-name="P8" text:outline-level="3"><text:span text:style-name="Emphasis"><text:span text:style-name="T7">What are Objects</text:span></text:span></text:h>
      <text:p text:style-name="P21"><text:span text:style-name="Emphasis"><text:span text:style-name="T7"/></text:span></text:p>
      <text:p text:style-name="P24">Building Blocks of OOP-Style Code</text:p>
      <text:p text:style-name="P21"><text:span text:style-name="T6">They group related </text:span><text:span text:style-name="Strong_20_Emphasis"><text:span text:style-name="T6">values</text:span></text:span><text:span text:style-name="T6"> in a single unit</text:span></text:p>
      <text:p text:style-name="P21"><text:span text:style-name="T6">Provide </text:span><text:span text:style-name="Strong_20_Emphasis"><text:span text:style-name="T6">functions (methods)</text:span></text:span><text:span text:style-name="T6"> that operate on the object's values</text:span></text:p>
      <text:p text:style-name="P13"><text:span text:style-name="Source_20_Text"><text:span text:style-name="T15">my_first_list = [</text:span></text:span><text:span text:style-name="Source_20_Text"><text:span text:style-name="T18">1</text:span></text:span><text:span text:style-name="Source_20_Text"><text:span text:style-name="T15">, </text:span></text:span><text:span text:style-name="Source_20_Text"><text:span text:style-name="T18">3</text:span></text:span><text:span text:style-name="Source_20_Text"><text:span text:style-name="T15">, </text:span></text:span><text:span text:style-name="Source_20_Text"><text:span text:style-name="T18">2</text:span></text:span><text:span text:style-name="Source_20_Text"><text:span text:style-name="T15">, </text:span></text:span><text:span text:style-name="Source_20_Text"><text:span text:style-name="T18">3</text:span></text:span><text:span text:style-name="Source_20_Text"><text:span text:style-name="T15">]</text:span></text:span></text:p>
      <text:p text:style-name="P14"><text:span text:style-name="Source_20_Text"><text:span text:style-name="T15">my_second_list = [</text:span></text:span><text:span text:style-name="Source_20_Text"><text:span text:style-name="T18">7</text:span></text:span><text:span text:style-name="Source_20_Text"><text:span text:style-name="T15">, </text:span></text:span><text:span text:style-name="Source_20_Text"><text:span text:style-name="T18">8</text:span></text:span><text:span text:style-name="Source_20_Text"><text:span text:style-name="T15">, </text:span></text:span><text:span text:style-name="Source_20_Text"><text:span text:style-name="T18">9</text:span></text:span><text:span text:style-name="Source_20_Text"><text:span text:style-name="T15">, </text:span></text:span><text:span text:style-name="Source_20_Text"><text:span text:style-name="T18">8</text:span></text:span><text:span text:style-name="Source_20_Text"><text:span text:style-name="T15">]</text:span></text:span></text:p>
      <text:p text:style-name="P14"/>
      <text:p text:style-name="P14"><text:span text:style-name="Source_20_Text"><text:span text:style-name="T19">print</text:span></text:span><text:span text:style-name="Source_20_Text"><text:span text:style-name="T15">(my_first_list.count(</text:span></text:span><text:span text:style-name="Source_20_Text"><text:span text:style-name="T18">3</text:span></text:span><text:span text:style-name="Source_20_Text"><text:span text:style-name="T15">)) <text:s text:c="2"/></text:span></text:span><text:span text:style-name="Source_20_Text"><text:span text:style-name="T20"># 2</text:span></text:span></text:p>
      <text:p text:style-name="P14"><text:span text:style-name="Source_20_Text"><text:span text:style-name="T19">print</text:span></text:span><text:span text:style-name="Source_20_Text"><text:span text:style-name="T15">(my_second_list.count(</text:span></text:span><text:span text:style-name="Source_20_Text"><text:span text:style-name="T18">3</text:span></text:span><text:span text:style-name="Source_20_Text"><text:span text:style-name="T15">)) <text:s/></text:span></text:span><text:span text:style-name="Source_20_Text"><text:span text:style-name="T20"># 0</text:span></text:span></text:p>
      <text:p text:style-name="P24">Two list objects with different values.</text:p>
      <text:p text:style-name="P21"><text:span text:style-name="T6">The same method (</text:span><text:span text:style-name="Source_20_Text"><text:span text:style-name="T16">count</text:span></text:span><text:span text:style-name="T6">) can operate on the values of two different objects</text:span></text:p>
      <text:p text:style-name="P21"><text:span text:style-name="Emphasis"><text:span text:style-name="T6"/></text:span></text:p>
      <text:h text:style-name="P6" text:outline-level="2"><text:span text:style-name="Emphasis"><text:span text:style-name="T8">What are Classes?</text:span></text:span></text:h>
      <text:p text:style-name="P24">Classes allow us to describe how a custom object looks like.</text:p>
      <text:p text:style-name="P21"><text:span text:style-name="Strong_20_Emphasis"><text:span text:style-name="T6">Object state</text:span></text:span><text:span text:style-name="T6"> – its data, described by attributes</text:span></text:p>
      <text:p text:style-name="P21"><text:span text:style-name="Strong_20_Emphasis"><text:span text:style-name="T6">Object behavior</text:span></text:span><text:span text:style-name="T6"> – its functionality, described by methods</text:span></text:p>
      <text:h text:style-name="P9" text:outline-level="3">Example: Defining and Using a Class</text:h>
      <text:p text:style-name="P13"><text:span text:style-name="Source_20_Text"><text:span text:style-name="T21">class</text:span></text:span><text:span text:style-name="Source_20_Text"><text:span text:style-name="T15"> </text:span></text:span><text:span text:style-name="Source_20_Text"><text:span text:style-name="T19">Car</text:span></text:span><text:span text:style-name="Source_20_Text"><text:span text:style-name="T15">:</text:span></text:span></text:p>
      <text:p text:style-name="P14"><text:span text:style-name="Source_20_Text"><text:span text:style-name="T14"><text:s text:c="4"/></text:span></text:span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__init__</text:span></text:span><text:span text:style-name="Source_20_Text"><text:span text:style-name="T15">(self, brand):</text:span></text:span></text:p>
      <text:p text:style-name="P14"><text:span text:style-name="Source_20_Text"><text:span text:style-name="T14"><text:s text:c="8"/></text:span></text:span><text:span text:style-name="Source_20_Text"><text:span text:style-name="T18">self</text:span></text:span><text:span text:style-name="Source_20_Text"><text:span text:style-name="T15">.brand = brand</text:span></text:span></text:p>
      <text:p text:style-name="P14"/>
      <text:p text:style-name="P14"><text:span text:style-name="Source_20_Text"><text:span text:style-name="T15">audi = Car(</text:span></text:span><text:span text:style-name="Source_20_Text"><text:span text:style-name="T24">'Audi'</text:span></text:span><text:span text:style-name="Source_20_Text"><text:span text:style-name="T15">)</text:span></text:span></text:p>
      <text:p text:style-name="P14"><text:span text:style-name="Source_20_Text"><text:span text:style-name="T15">nissan = Car(</text:span></text:span><text:span text:style-name="Source_20_Text"><text:span text:style-name="T24">'Nissan'</text:span></text:span><text:span text:style-name="Source_20_Text"><text:span text:style-name="T15">)</text:span></text:span></text:p>
      <text:p text:style-name="P14"><text:span text:style-name="Source_20_Text"><text:span text:style-name="T15">volvo = Car(</text:span></text:span><text:span text:style-name="Source_20_Text"><text:span text:style-name="T24">'Volvo'</text:span></text:span><text:span text:style-name="Source_20_Text"><text:span text:style-name="T15">)</text:span></text:span></text:p>
      <text:p text:style-name="P14"/>
      <text:p text:style-name="P14"><text:span text:style-name="Source_20_Text"><text:span text:style-name="T19">print</text:span></text:span><text:span text:style-name="Source_20_Text"><text:span text:style-name="T15">(nissan.brand)</text:span></text:span></text:p>
      <text:p text:style-name="P21"><text:soft-page-break/><text:span text:style-name="Emphasis"><text:span text:style-name="T6"/></text:span></text:p>
      <text:h text:style-name="P4" text:outline-level="2">State</text:h>
      <text:p text:style-name="P31"><text:span text:style-name="T9">Each object has its own </text:span><text:span text:style-name="Strong_20_Emphasis"><text:span text:style-name="T9">state</text:span></text:span><text:span text:style-name="T9">:</text:span></text:p>
      <text:p text:style-name="P31"><text:span text:style-name="T9">Described by </text:span><text:span text:style-name="Strong_20_Emphasis"><text:span text:style-name="T9">attributes</text:span></text:span></text:p>
      <text:p text:style-name="P25">State can evolve over time, usually through methods</text:p>
      <text:h text:style-name="P10" text:outline-level="3">Example</text:h>
      <text:p text:style-name="P13"><text:span text:style-name="Source_20_Text"><text:span text:style-name="T15">nissan = Car(</text:span></text:span><text:span text:style-name="Source_20_Text"><text:span text:style-name="T24">'Nissan'</text:span></text:span><text:span text:style-name="Source_20_Text"><text:span text:style-name="T15">, </text:span></text:span><text:span text:style-name="Source_20_Text"><text:span text:style-name="T18">168</text:span></text:span><text:span text:style-name="Source_20_Text"><text:span text:style-name="T15">)</text:span></text:span></text:p>
      <text:p text:style-name="P14"><text:span text:style-name="Source_20_Text"><text:span text:style-name="T15">nissan.brand <text:s text:c="8"/></text:span></text:span><text:span text:style-name="Source_20_Text"><text:span text:style-name="T20"># 'Nissan'</text:span></text:span></text:p>
      <text:p text:style-name="P14"><text:span text:style-name="Source_20_Text"><text:span text:style-name="T15">nissan.horse_power <text:s text:c="2"/></text:span></text:span><text:span text:style-name="Source_20_Text"><text:span text:style-name="T20"># 168</text:span></text:span></text:p>
      <text:p text:style-name="P14"/>
      <text:p text:style-name="P14"><text:span text:style-name="Source_20_Text"><text:span text:style-name="T15">new_engine = Engine(</text:span></text:span><text:span text:style-name="Source_20_Text"><text:span text:style-name="T24">'V8'</text:span></text:span><text:span text:style-name="Source_20_Text"><text:span text:style-name="T15">)</text:span></text:span></text:p>
      <text:p text:style-name="P14"><text:span text:style-name="Source_20_Text"><text:span text:style-name="T15">nissan.modify(new_engine)</text:span></text:span></text:p>
      <text:p text:style-name="P14"><text:span text:style-name="Source_20_Text"><text:span text:style-name="T15">nissan.horse_power</text:span></text:span></text:p>
      <text:h text:style-name="P4" text:outline-level="2">Behavior</text:h>
      <text:p text:style-name="P25">Describes how an object's state can be used.</text:p>
      <text:p text:style-name="P31"><text:span text:style-name="Strong_20_Emphasis"><text:span text:style-name="T9">Behavior is implemented in methods</text:span></text:span></text:p>
      <text:p text:style-name="P25">Methods are regular functions inside the class definition</text:p>
      <text:h text:style-name="P10" text:outline-level="3">Example</text:h>
      <text:p text:style-name="P13"><text:span text:style-name="Source_20_Text"><text:span text:style-name="T21">class</text:span></text:span><text:span text:style-name="Source_20_Text"><text:span text:style-name="T15"> </text:span></text:span><text:span text:style-name="Source_20_Text"><text:span text:style-name="T19">Car</text:span></text:span><text:span text:style-name="Source_20_Text"><text:span text:style-name="T15">:</text:span></text:span></text:p>
      <text:p text:style-name="P14"><text:span text:style-name="Source_20_Text"><text:span text:style-name="T14"><text:s text:c="4"/></text:span></text:span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modify</text:span></text:span><text:span text:style-name="Source_20_Text"><text:span text:style-name="T15">(self, new_engine):</text:span></text:span></text:p>
      <text:p text:style-name="P14"><text:span text:style-name="Source_20_Text"><text:span text:style-name="T14"><text:s text:c="8"/></text:span></text:span><text:span text:style-name="Source_20_Text"><text:span text:style-name="T18">self</text:span></text:span><text:span text:style-name="Source_20_Text"><text:span text:style-name="T15">.horse_power += new_engine.power</text:span></text:span></text:p>
      <text:h text:style-name="P4" text:outline-level="2">Self Parameter</text:h>
      <text:p text:style-name="P31"><text:span text:style-name="T9">The </text:span><text:span text:style-name="Source_20_Text"><text:span text:style-name="T17">self</text:span></text:span><text:span text:style-name="T9"> parameter:</text:span></text:p>
      <text:p text:style-name="P25">The first argument in a method</text:p>
      <text:p text:style-name="P25">Refers to the object/instance that invoked the method</text:p>
      <text:p text:style-name="P25">Can be named anything, but must be first</text:p>
      <text:p text:style-name="P25">Used to access the object's state</text:p>
      <text:h text:style-name="P10" text:outline-level="3">Example</text:h>
      <text:p text:style-name="P29">BashC++C#CSSGoHTMLJavaJavaScriptJSONMarkdownPHPPlain TextPythonRubyRustSQLTypeScriptXMLYAML</text:p>
      <text:p text:style-name="P13"><text:span text:style-name="Source_20_Text"><text:span text:style-name="T21">class</text:span></text:span><text:span text:style-name="Source_20_Text"><text:span text:style-name="T15"> </text:span></text:span><text:span text:style-name="Source_20_Text"><text:span text:style-name="T19">Car</text:span></text:span><text:span text:style-name="Source_20_Text"><text:span text:style-name="T15">:</text:span></text:span></text:p>
      <text:p text:style-name="P14"><text:span text:style-name="Source_20_Text"><text:span text:style-name="T14"><text:s text:c="4"/></text:span></text:span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modify</text:span></text:span><text:span text:style-name="Source_20_Text"><text:span text:style-name="T15">(self, new_engine):</text:span></text:span></text:p>
      <text:p text:style-name="P14"><text:soft-page-break/><text:span text:style-name="Source_20_Text"><text:span text:style-name="T14"><text:s text:c="8"/></text:span></text:span><text:span text:style-name="Source_20_Text"><text:span text:style-name="T18">self</text:span></text:span><text:span text:style-name="Source_20_Text"><text:span text:style-name="T15">.horse_power += new_engine.power</text:span></text:span></text:p>
      <text:p text:style-name="P14"/>
      <text:p text:style-name="P14"><text:span text:style-name="Source_20_Text"><text:span text:style-name="T15">audi = Car(</text:span></text:span><text:span text:style-name="Source_20_Text"><text:span text:style-name="T24">"Audi"</text:span></text:span><text:span text:style-name="Source_20_Text"><text:span text:style-name="T15">)</text:span></text:span></text:p>
      <text:p text:style-name="P15"><text:span text:style-name="Source_20_Text"><text:span text:style-name="T15">nissan = Car(</text:span></text:span><text:span text:style-name="Source_20_Text"><text:span text:style-name="T24">"Nissan"</text:span></text:span><text:span text:style-name="Source_20_Text"><text:span text:style-name="T15">)</text:span></text:span></text:p>
      <text:p text:style-name="P15"><text:span text:style-name="Source_20_Text"><text:span text:style-name="T11">Classes, Objects, and Instances</text:span></text:span></text:p>
      <text:p text:style-name="P25">These three terms are sometimes confused by beginners:</text:p>
      <text:p text:style-name="P31"><text:span text:style-name="Strong_20_Emphasis"><text:span text:style-name="T9">Classes describe objects</text:span></text:span></text:p>
      <text:p text:style-name="P31"><text:span text:style-name="Strong_20_Emphasis"><text:span text:style-name="T9">Objects are instances of classes</text:span></text:span></text:p>
      <text:p text:style-name="P31"><text:span text:style-name="Emphasis"><text:span text:style-name="T9">"Object of type Car"</text:span></text:span><text:span text:style-name="T9"> and </text:span><text:span text:style-name="Emphasis"><text:span text:style-name="T9">"Instance of type Car"</text:span></text:span><text:span text:style-name="T9"> are synonymous</text:span></text:p>
      <text:p text:style-name="P15"><text:span text:style-name="Source_20_Text"><text:span text:style-name="T15"/></text:span></text:p>
      <text:p text:style-name="P14"><text:span text:style-name="Source_20_Text"><text:span text:style-name="T15">nissan.modify(new_engine)</text:span></text:span></text:p>
      <text:p text:style-name="P14"><text:span text:style-name="Source_20_Text"><text:span text:style-name="T15">audi.modify(new_engine)</text:span></text:span></text:p>
      <text:h text:style-name="P7" text:outline-level="3"><text:span text:style-name="Source_20_Text"><text:span text:style-name="T12">OOP Principles</text:span></text:span></text:h>
      <text:p text:style-name="P25">OOP code is often described by four fundamental principles:</text:p>
      <table:table table:name="Table1" table:style-name="Table1">
        <table:table-column table:style-name="Table1.A"/>
        <table:table-column table:style-name="Table1.B"/>
        <table:table-row table:style-name="TableLine2298061058832">
          <table:table-cell table:style-name="Table1.A1" office:value-type="string">
            <text:p text:style-name="P19">Principle</text:p>
          </table:table-cell>
          <table:table-cell table:style-name="Table1.A1" office:value-type="string">
            <text:p text:style-name="P19">Description</text:p>
          </table:table-cell>
        </table:table-row>
        <table:table-row table:style-name="Table1.2">
          <table:table-cell table:style-name="Table1.A1" office:value-type="string">
            <text:p text:style-name="P17"><text:span text:style-name="Strong_20_Emphasis"><text:span text:style-name="T1">Encapsulation</text:span></text:span></text:p>
          </table:table-cell>
          <table:table-cell table:style-name="Table1.A1" office:value-type="string">
            <text:p text:style-name="P18">Classes group together (encapsulate) related values and functions in a coherent entity</text:p>
          </table:table-cell>
        </table:table-row>
        <table:table-row table:style-name="TableLine2298061058832">
          <table:table-cell table:style-name="Table1.A1" office:value-type="string">
            <text:p text:style-name="P17"><text:span text:style-name="Strong_20_Emphasis"><text:span text:style-name="T1">Inheritance</text:span></text:span></text:p>
          </table:table-cell>
          <table:table-cell table:style-name="Table1.A1" office:value-type="string">
            <text:p text:style-name="P18">A class may reuse state and behavior from another class</text:p>
          </table:table-cell>
        </table:table-row>
        <table:table-row table:style-name="Table1.2">
          <table:table-cell table:style-name="Table1.A1" office:value-type="string">
            <text:p text:style-name="P17"><text:span text:style-name="Strong_20_Emphasis"><text:span text:style-name="T1">Abstraction</text:span></text:span></text:p>
          </table:table-cell>
          <table:table-cell table:style-name="Table1.A1" office:value-type="string">
            <text:p text:style-name="P18">Classes describe only the state and behavior relevant to the needs of the application</text:p>
          </table:table-cell>
        </table:table-row>
        <table:table-row table:style-name="TableLine2298061058832">
          <table:table-cell table:style-name="Table1.A1" office:value-type="string">
            <text:p text:style-name="P17"><text:span text:style-name="Strong_20_Emphasis"><text:span text:style-name="T1">Polymorphism</text:span></text:span></text:p>
          </table:table-cell>
          <table:table-cell table:style-name="Table1.A1" office:value-type="string">
            <text:p text:style-name="P18">A class may modify or extend inherited methods</text:p>
          </table:table-cell>
        </table:table-row>
      </table:table>
      <text:p text:style-name="P14"><text:span text:style-name="Source_20_Text"><text:span text:style-name="T15"/></text:span></text:p>
      <text:h text:style-name="P5" text:outline-level="2"><text:span text:style-name="Source_20_Text"><text:span text:style-name="T11">Components of a Class</text:span></text:span></text:h>
      <text:h text:style-name="P10" text:outline-level="3">Any class has at least one (or more) of the following elements:</text:h>
      <text:p text:style-name="P25">Attributes</text:p>
      <text:p text:style-name="P25">Similar to variables</text:p>
      <text:p text:style-name="P25">Accessible only through instances of the class</text:p>
      <text:p text:style-name="P25">Hold the state</text:p>
      <text:p text:style-name="P25">Methods</text:p>
      <text:p text:style-name="P25">Functions defined in the class</text:p>
      <text:p text:style-name="P25">Describe the functionality</text:p>
      <text:p text:style-name="P25">Initializer</text:p>
      <text:p text:style-name="P25"><text:soft-page-break/>Special method that is invoked at creation time</text:p>
      <text:p text:style-name="P25">Initializes the state</text:p>
      <text:p text:style-name="P14"><text:span text:style-name="Source_20_Text"><text:span text:style-name="T15"/></text:span></text:p>
      <text:h text:style-name="P5" text:outline-level="2"><text:span text:style-name="Source_20_Text"><text:span text:style-name="T11">Initializer</text:span></text:span></text:h>
      <text:p text:style-name="P31"><text:span text:style-name="T9">A special method, defined as </text:span><text:span text:style-name="Source_20_Text"><text:span text:style-name="T17">__init__</text:span></text:span><text:span text:style-name="T9"> (double underscore </text:span><text:span text:style-name="Source_20_Text"><text:span text:style-name="T17">init</text:span></text:span><text:span text:style-name="T9">), is automatically invoked when you instantiate a class.</text:span></text:p>
      <text:p text:style-name="P13"><text:span text:style-name="Source_20_Text"><text:span text:style-name="T21">class</text:span></text:span><text:span text:style-name="Source_20_Text"><text:span text:style-name="T15"> </text:span></text:span><text:span text:style-name="Source_20_Text"><text:span text:style-name="T19">Product</text:span></text:span><text:span text:style-name="Source_20_Text"><text:span text:style-name="T15">:</text:span></text:span></text:p>
      <text:p text:style-name="P14"><text:span text:style-name="Source_20_Text"><text:span text:style-name="T14"><text:s text:c="4"/></text:span></text:span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__init__</text:span></text:span><text:span text:style-name="Source_20_Text"><text:span text:style-name="T15">(self, name, price):</text:span></text:span></text:p>
      <text:p text:style-name="P14"><text:span text:style-name="Source_20_Text"><text:span text:style-name="T14"><text:s text:c="8"/></text:span></text:span><text:span text:style-name="Source_20_Text"><text:span text:style-name="T18">self</text:span></text:span><text:span text:style-name="Source_20_Text"><text:span text:style-name="T15">.name = name</text:span></text:span></text:p>
      <text:p text:style-name="P14"><text:span text:style-name="Source_20_Text"><text:span text:style-name="T14"><text:s text:c="8"/></text:span></text:span><text:span text:style-name="Source_20_Text"><text:span text:style-name="T18">self</text:span></text:span><text:span text:style-name="Source_20_Text"><text:span text:style-name="T15">.price = price</text:span></text:span></text:p>
      <text:p text:style-name="P14"/>
      <text:p text:style-name="P14"><text:span text:style-name="Source_20_Text"><text:span text:style-name="T15">cheese = Product(</text:span></text:span><text:span text:style-name="Source_20_Text"><text:span text:style-name="T24">'Cheese'</text:span></text:span><text:span text:style-name="Source_20_Text"><text:span text:style-name="T15">, </text:span></text:span><text:span text:style-name="Source_20_Text"><text:span text:style-name="T18">8.00</text:span></text:span><text:span text:style-name="Source_20_Text"><text:span text:style-name="T15">)</text:span></text:span></text:p>
      <text:p text:style-name="P14"><text:span text:style-name="Source_20_Text"><text:span text:style-name="T15">wine = Product(</text:span></text:span><text:span text:style-name="Source_20_Text"><text:span text:style-name="T24">'Wine'</text:span></text:span><text:span text:style-name="Source_20_Text"><text:span text:style-name="T15">, </text:span></text:span><text:span text:style-name="Source_20_Text"><text:span text:style-name="T18">12.50</text:span></text:span><text:span text:style-name="Source_20_Text"><text:span text:style-name="T15">)</text:span></text:span></text:p>
      <text:h text:style-name="P5" text:outline-level="2"><text:span text:style-name="Source_20_Text"><text:span text:style-name="T11">Defining Attributes</text:span></text:span></text:h>
      <text:p text:style-name="P30"/>
      <text:p text:style-name="P22">We usually define the attributes inside the initializer.</text:p>
      <text:p text:style-name="P23"/>
      <text:p text:style-name="P11"><text:span text:style-name="Source_20_Text"><text:span text:style-name="T29">class</text:span></text:span><text:span text:style-name="Source_20_Text"><text:span text:style-name="T3"> </text:span></text:span><text:span text:style-name="Source_20_Text"><text:span text:style-name="T28">Product</text:span></text:span><text:span text:style-name="Source_20_Text"><text:span text:style-name="T3">:</text:span></text:span></text:p>
      <text:p text:style-name="P12"><text:span text:style-name="Source_20_Text"><text:span text:style-name="T5"><text:s text:c="4"/></text:span></text:span><text:span text:style-name="Source_20_Text"><text:span text:style-name="T29">def</text:span></text:span><text:span text:style-name="Source_20_Text"><text:span text:style-name="T3"> </text:span></text:span><text:span text:style-name="Source_20_Text"><text:span text:style-name="T30">__init__</text:span></text:span><text:span text:style-name="Source_20_Text"><text:span text:style-name="T3">(self, name, price):</text:span></text:span></text:p>
      <text:p text:style-name="P12"><text:span text:style-name="Source_20_Text"><text:span text:style-name="T5"><text:s text:c="8"/></text:span></text:span><text:span text:style-name="Source_20_Text"><text:span text:style-name="T27">self</text:span></text:span><text:span text:style-name="Source_20_Text"><text:span text:style-name="T3">.name = name</text:span></text:span></text:p>
      <text:p text:style-name="P12"><text:span text:style-name="Source_20_Text"><text:span text:style-name="T5"><text:s text:c="8"/></text:span></text:span><text:span text:style-name="Source_20_Text"><text:span text:style-name="T27">self</text:span></text:span><text:span text:style-name="Source_20_Text"><text:span text:style-name="T3">.price = price</text:span></text:span></text:p>
      <text:p text:style-name="P12"/>
      <text:p text:style-name="P12"><text:span text:style-name="Source_20_Text"><text:span text:style-name="T3">cheese = Product(</text:span></text:span><text:span text:style-name="Source_20_Text"><text:span text:style-name="T31">'Cheese'</text:span></text:span><text:span text:style-name="Source_20_Text"><text:span text:style-name="T3">, </text:span></text:span><text:span text:style-name="Source_20_Text"><text:span text:style-name="T27">8.00</text:span></text:span><text:span text:style-name="Source_20_Text"><text:span text:style-name="T3">)</text:span></text:span></text:p>
      <text:p text:style-name="P12"><text:span text:style-name="Source_20_Text"><text:span text:style-name="T3">wine = Product(</text:span></text:span><text:span text:style-name="Source_20_Text"><text:span text:style-name="T31">'Wine'</text:span></text:span><text:span text:style-name="Source_20_Text"><text:span text:style-name="T3">, </text:span></text:span><text:span text:style-name="Source_20_Text"><text:span text:style-name="T27">12.50</text:span></text:span><text:span text:style-name="Source_20_Text"><text:span text:style-name="T3">)</text:span></text:span></text:p>
      <text:p text:style-name="P30"/>
      <text:p text:style-name="P30"/>
      <text:p text:style-name="P30"><text:span text:style-name="T2">We describe </text:span><text:span text:style-name="Source_20_Text"><text:span text:style-name="T4">Product</text:span></text:span><text:span text:style-name="T2"> as an entity with </text:span><text:span text:style-name="Source_20_Text"><text:span text:style-name="T4">name</text:span></text:span><text:span text:style-name="T2"> and </text:span><text:span text:style-name="Source_20_Text"><text:span text:style-name="T4">price</text:span></text:span><text:span text:style-name="T2">.</text:span></text:p>
      <text:p text:style-name="P22">The initializer is usually defined with some parameters.</text:p>
      <text:p text:style-name="P22">We assign those parameters as the new object's attributes:</text:p>
      <text:p text:style-name="P30"><text:span text:style-name="Source_20_Text"><text:span text:style-name="T4">self.name</text:span></text:span><text:span text:style-name="T2"> ← </text:span><text:span text:style-name="Source_20_Text"><text:span text:style-name="T4">name</text:span></text:span></text:p>
      <text:p text:style-name="P30"><text:span text:style-name="Source_20_Text"><text:span text:style-name="T4">self.price</text:span></text:span><text:span text:style-name="T2"> ← </text:span><text:span text:style-name="Source_20_Text"><text:span text:style-name="T4">price</text:span></text:span></text:p>
      <text:p text:style-name="P22"/>
      <text:h text:style-name="P5" text:outline-level="2"><text:span text:style-name="Source_20_Text"><text:span text:style-name="T11">Attributes</text:span></text:span></text:h>
      <text:p text:style-name="P31"><text:span text:style-name="T9">We access attributes by using the </text:span><text:span text:style-name="Source_20_Text"><text:span text:style-name="T17">.</text:span></text:span><text:span text:style-name="T9"> (dot) operator.</text:span></text:p>
      <text:p text:style-name="P31"/>
      <text:p text:style-name="P31"><text:soft-page-break/></text:p>
      <text:p text:style-name="P26">BashC++C#CSSGoHTMLJavaJavaScriptJSONMarkdownPHPPlain TextPythonRubyRustSQLTypeScriptXMLYAML</text:p>
      <text:p text:style-name="P13"><text:span text:style-name="Source_20_Text"><text:span text:style-name="T15">cheese = Product(</text:span></text:span><text:span text:style-name="Source_20_Text"><text:span text:style-name="T24">'Cheese'</text:span></text:span><text:span text:style-name="Source_20_Text"><text:span text:style-name="T15">, </text:span></text:span><text:span text:style-name="Source_20_Text"><text:span text:style-name="T18">8.0</text:span></text:span><text:span text:style-name="Source_20_Text"><text:span text:style-name="T15">)</text:span></text:span></text:p>
      <text:p text:style-name="P14"><text:span text:style-name="Source_20_Text"><text:span text:style-name="T19">print</text:span></text:span><text:span text:style-name="Source_20_Text"><text:span text:style-name="T15">(cheese.price) <text:s text:c="5"/></text:span></text:span><text:span text:style-name="Source_20_Text"><text:span text:style-name="T20"># 8.0</text:span></text:span></text:p>
      <text:p text:style-name="P14"/>
      <text:p text:style-name="P14"><text:span text:style-name="Source_20_Text"><text:span text:style-name="T15">cheese.price = </text:span></text:span><text:span text:style-name="Source_20_Text"><text:span text:style-name="T18">9.0</text:span></text:span></text:p>
      <text:p text:style-name="P14"><text:span text:style-name="Source_20_Text"><text:span text:style-name="T19">print</text:span></text:span><text:span text:style-name="Source_20_Text"><text:span text:style-name="T15">(cheese.price) <text:s text:c="5"/></text:span></text:span><text:span text:style-name="Source_20_Text"><text:span text:style-name="T20"># 9.0</text:span></text:span></text:p>
      <text:p text:style-name="P14"><text:span text:style-name="Source_20_Text"><text:span text:style-name="T15">cheese.is_smelly = </text:span></text:span><text:span text:style-name="Source_20_Text"><text:span text:style-name="T25">True</text:span></text:span></text:p>
      <text:p text:style-name="P14"><text:span text:style-name="Source_20_Text"><text:span text:style-name="T19">print</text:span></text:span><text:span text:style-name="Source_20_Text"><text:span text:style-name="T15">(cheese.is_smelly) <text:s/></text:span></text:span><text:span text:style-name="Source_20_Text"><text:span text:style-name="T20"># True</text:span></text:span></text:p>
      <text:p text:style-name="P31"/>
      <text:p text:style-name="P25">We can read an attribute value.</text:p>
      <text:p text:style-name="P31"/>
      <text:p text:style-name="P25">We can use the assignment operator to change an attribute value.</text:p>
      <text:p text:style-name="P31"/>
      <text:p text:style-name="P31"><text:span text:style-name="T9">We can even add new attributes to an instance.<text:line-break/></text:span><text:span text:style-name="Strong_20_Emphasis"><text:span text:style-name="T9">(Avoid writing such code.)</text:span></text:span></text:p>
      <text:p text:style-name="P14"><text:span text:style-name="Source_20_Text"><text:span text:style-name="T15"/></text:span></text:p>
      <text:h text:style-name="P4" text:outline-level="2">Methods</text:h>
      <text:p text:style-name="P25">Methods are regular functions with two important differences:</text:p>
      <text:p text:style-name="P25">They are defined inside a class</text:p>
      <text:p text:style-name="P31"><text:span text:style-name="T9">They can access instance data through the </text:span><text:span text:style-name="Source_20_Text"><text:span text:style-name="T17">self</text:span></text:span><text:span text:style-name="T9"> parameter</text:span></text:p>
      <text:p text:style-name="P13"><text:span text:style-name="Source_20_Text"><text:span text:style-name="T21">class</text:span></text:span><text:span text:style-name="Source_20_Text"><text:span text:style-name="T15"> </text:span></text:span><text:span text:style-name="Source_20_Text"><text:span text:style-name="T19">Product</text:span></text:span><text:span text:style-name="Source_20_Text"><text:span text:style-name="T15">:</text:span></text:span></text:p>
      <text:p text:style-name="P14"><text:span text:style-name="Source_20_Text"><text:span text:style-name="T14"><text:s text:c="4"/></text:span></text:span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advertise</text:span></text:span><text:span text:style-name="Source_20_Text"><text:span text:style-name="T15">(self):</text:span></text:span></text:p>
      <text:p text:style-name="P14"><text:span text:style-name="Source_20_Text"><text:span text:style-name="T14"><text:s text:c="8"/></text:span></text:span><text:span text:style-name="Source_20_Text"><text:span text:style-name="T15">msg = </text:span></text:span><text:span text:style-name="Source_20_Text"><text:span text:style-name="T24">f'Lovely {self.name} for only {self.price}!'</text:span></text:span></text:p>
      <text:p text:style-name="P14"><text:span text:style-name="Source_20_Text"><text:span text:style-name="T14"><text:s text:c="8"/></text:span></text:span><text:span text:style-name="Source_20_Text"><text:span text:style-name="T21">return</text:span></text:span><text:span text:style-name="Source_20_Text"><text:span text:style-name="T15"> msg</text:span></text:span></text:p>
      <text:p text:style-name="P14"/>
      <text:p text:style-name="P14"><text:span text:style-name="Source_20_Text"><text:span text:style-name="T19">print</text:span></text:span><text:span text:style-name="Source_20_Text"><text:span text:style-name="T15">(cheese.advertise())</text:span></text:span></text:p>
      <text:p text:style-name="P14"><text:span text:style-name="Source_20_Text"><text:span text:style-name="T20"># `self` refers to the object calling the method.</text:span></text:span></text:p>
      <text:h text:style-name="P4" text:outline-level="2">Methods (Parameters)</text:h>
      <text:p text:style-name="P31"><text:span text:style-name="Source_20_Text"><text:span text:style-name="T17">self</text:span></text:span><text:span text:style-name="T9"> is always the first parameter.</text:span></text:p>
      <text:p text:style-name="P25">We pass only the additional parameters when using the method.</text:p>
      <text:p text:style-name="P29">BashC++C#CSSGoHTMLJavaJavaScriptJSONMarkdownPHPPlain TextPythonRubyRustSQLTypeScriptXMLYAML</text:p>
      <text:p text:style-name="P13"><text:soft-page-break/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apply_discount</text:span></text:span><text:span text:style-name="Source_20_Text"><text:span text:style-name="T15">(self, percentage):</text:span></text:span></text:p>
      <text:p text:style-name="P14"><text:span text:style-name="Source_20_Text"><text:span text:style-name="T14"><text:s text:c="4"/></text:span></text:span><text:span text:style-name="Source_20_Text"><text:span text:style-name="T18">self</text:span></text:span><text:span text:style-name="Source_20_Text"><text:span text:style-name="T15">.price -= </text:span></text:span><text:span text:style-name="Source_20_Text"><text:span text:style-name="T18">self</text:span></text:span><text:span text:style-name="Source_20_Text"><text:span text:style-name="T15">.price * (percentage / </text:span></text:span><text:span text:style-name="Source_20_Text"><text:span text:style-name="T18">100</text:span></text:span><text:span text:style-name="Source_20_Text"><text:span text:style-name="T15">)</text:span></text:span></text:p>
      <text:p text:style-name="P14"/>
      <text:p text:style-name="P14"><text:span text:style-name="Source_20_Text"><text:span text:style-name="T15">cheese.apply_discount(</text:span></text:span><text:span text:style-name="Source_20_Text"><text:span text:style-name="T18">10</text:span></text:span><text:span text:style-name="Source_20_Text"><text:span text:style-name="T15">)</text:span></text:span></text:p>
      <text:p text:style-name="P16"/>
      <text:h text:style-name="P4" text:outline-level="2">What are Methods Used For?</text:h>
      <text:p text:style-name="P31"/>
      <text:p text:style-name="P31"><text:span text:style-name="Strong_20_Emphasis"><text:span text:style-name="T9">Use</text:span></text:span><text:span text:style-name="T9"> and/or </text:span><text:span text:style-name="Strong_20_Emphasis"><text:span text:style-name="T9">Modify</text:span></text:span><text:span text:style-name="T9"> object data</text:span></text:p>
      <text:p text:style-name="P31"><text:span text:style-name="Strong_20_Emphasis"><text:span text:style-name="T9">Don't</text:span></text:span><text:span text:style-name="T9"> ignore the object</text:span></text:p>
      <text:p text:style-name="P13"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advertise</text:span></text:span><text:span text:style-name="Source_20_Text"><text:span text:style-name="T15">(self):</text:span></text:span></text:p>
      <text:p text:style-name="P14"><text:span text:style-name="Source_20_Text"><text:span text:style-name="T14"><text:s text:c="4"/></text:span></text:span><text:span text:style-name="Source_20_Text"><text:span text:style-name="T21">return</text:span></text:span><text:span text:style-name="Source_20_Text"><text:span text:style-name="T15"> </text:span></text:span><text:span text:style-name="Source_20_Text"><text:span text:style-name="T24">f'Try my lovely {self.name} for only {self.price}!'</text:span></text:span></text:p>
      <text:p text:style-name="P14"/>
      <text:p text:style-name="P14"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apply_discount</text:span></text:span><text:span text:style-name="Source_20_Text"><text:span text:style-name="T15">(self, percentage):</text:span></text:span></text:p>
      <text:p text:style-name="P14"><text:span text:style-name="Source_20_Text"><text:span text:style-name="T14"><text:s text:c="4"/></text:span></text:span><text:span text:style-name="Source_20_Text"><text:span text:style-name="T18">self</text:span></text:span><text:span text:style-name="Source_20_Text"><text:span text:style-name="T15">.price -= </text:span></text:span><text:span text:style-name="Source_20_Text"><text:span text:style-name="T18">self</text:span></text:span><text:span text:style-name="Source_20_Text"><text:span text:style-name="T15">.price * (percentage / </text:span></text:span><text:span text:style-name="Source_20_Text"><text:span text:style-name="T18">100</text:span></text:span><text:span text:style-name="Source_20_Text"><text:span text:style-name="T15">)</text:span></text:span></text:p>
      <text:p text:style-name="P14"/>
      <text:p text:style-name="P14"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catalogue</text:span></text:span><text:span text:style-name="Source_20_Text"><text:span text:style-name="T15">(self, products):</text:span></text:span></text:p>
      <text:p text:style-name="P14"><text:span text:style-name="Source_20_Text"><text:span text:style-name="T14"><text:s text:c="4"/></text:span></text:span><text:span text:style-name="Source_20_Text"><text:span text:style-name="T21">return</text:span></text:span><text:span text:style-name="Source_20_Text"><text:span text:style-name="T15"> </text:span></text:span><text:span text:style-name="Source_20_Text"><text:span text:style-name="T24">f'The shop offers {</text:span></text:span><text:span text:style-name="Source_20_Text"><text:span text:style-name="T19">len</text:span></text:span><text:span text:style-name="Source_20_Text"><text:span text:style-name="T24">(products)} products'</text:span></text:span></text:p>
      <text:h text:style-name="P1" text:outline-level="1">Overview</text:h>
      <text:h text:style-name="P9" text:outline-level="3">Python allows us to define class-level attributes and methods</text:h>
      <text:p text:style-name="P24">Main differences with instance-level attributes and methods:</text:p>
      <text:p text:style-name="P24">How they are used</text:p>
      <text:p text:style-name="P24">What they are used for</text:p>
      <text:p text:style-name="P13"><text:span text:style-name="Source_20_Text"><text:span text:style-name="T21">class</text:span></text:span><text:span text:style-name="Source_20_Text"><text:span text:style-name="T15"> </text:span></text:span><text:span text:style-name="Source_20_Text"><text:span text:style-name="T19">Product</text:span></text:span><text:span text:style-name="Source_20_Text"><text:span text:style-name="T15">:</text:span></text:span></text:p>
      <text:p text:style-name="P14"><text:span text:style-name="Source_20_Text"><text:span text:style-name="T14"><text:s text:c="4"/></text:span></text:span><text:span text:style-name="Source_20_Text"><text:span text:style-name="T15">serial_number = </text:span></text:span><text:span text:style-name="Source_20_Text"><text:span text:style-name="T18">0</text:span></text:span></text:p>
      <text:p text:style-name="P14"/>
      <text:p text:style-name="P14"><text:span text:style-name="Source_20_Text"><text:span text:style-name="T23"><text:s text:c="4"/></text:span></text:span><text:span text:style-name="Source_20_Text"><text:span text:style-name="T22">@classmethod</text:span></text:span></text:p>
      <text:p text:style-name="P14"><text:span text:style-name="Source_20_Text"><text:span text:style-name="T14"><text:s text:c="4"/></text:span></text:span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next_serial</text:span></text:span><text:span text:style-name="Source_20_Text"><text:span text:style-name="T15">(cls):</text:span></text:span></text:p>
      <text:p text:style-name="P14"><text:span text:style-name="Source_20_Text"><text:span text:style-name="T14"><text:s text:c="8"/></text:span></text:span><text:span text:style-name="Source_20_Text"><text:span text:style-name="T15">cls.serial_number += </text:span></text:span><text:span text:style-name="Source_20_Text"><text:span text:style-name="T18">1</text:span></text:span></text:p>
      <text:p text:style-name="P14"><text:span text:style-name="Source_20_Text"><text:span text:style-name="T14"><text:s text:c="8"/></text:span></text:span><text:span text:style-name="Source_20_Text"><text:span text:style-name="T21">return</text:span></text:span><text:span text:style-name="Source_20_Text"><text:span text:style-name="T15"> cls.serial_number</text:span></text:span></text:p>
      <text:p text:style-name="P24">Defined inside the class</text:p>
      <text:p text:style-name="P24">Their value is shared across all instances</text:p>
      <text:p text:style-name="P21"><text:soft-page-break/><text:span text:style-name="T6">Marked with </text:span><text:span text:style-name="Strong_20_Emphasis"><text:span text:style-name="T6">@classmethod</text:span></text:span><text:span text:style-name="T6"> decorator</text:span></text:p>
      <text:p text:style-name="P24">First parameter is a reference to the class, not an instance of the class</text:p>
      <text:p text:style-name="P16"/>
      <text:h text:style-name="P2" text:outline-level="2">Class Methods</text:h>
      <text:p text:style-name="P24">Use when you want to manipulate class data</text:p>
      <text:p text:style-name="P21"><text:span text:style-name="T6">The first parameter </text:span><text:span text:style-name="Source_20_Text"><text:span text:style-name="T16">cls</text:span></text:span><text:span text:style-name="T6"> is a reference to the class</text:span></text:p>
      <text:p text:style-name="P13"><text:span text:style-name="Source_20_Text"><text:span text:style-name="T21">class</text:span></text:span><text:span text:style-name="Source_20_Text"><text:span text:style-name="T15"> </text:span></text:span><text:span text:style-name="Source_20_Text"><text:span text:style-name="T19">Product</text:span></text:span><text:span text:style-name="Source_20_Text"><text:span text:style-name="T15">:</text:span></text:span></text:p>
      <text:p text:style-name="P14"><text:span text:style-name="Source_20_Text"><text:span text:style-name="T14"><text:s text:c="4"/></text:span></text:span><text:span text:style-name="Source_20_Text"><text:span text:style-name="T15">serial_number = </text:span></text:span><text:span text:style-name="Source_20_Text"><text:span text:style-name="T18">0</text:span></text:span></text:p>
      <text:p text:style-name="P14"/>
      <text:p text:style-name="P14"><text:span text:style-name="Source_20_Text"><text:span text:style-name="T23"><text:s text:c="4"/></text:span></text:span><text:span text:style-name="Source_20_Text"><text:span text:style-name="T22">@classmethod</text:span></text:span></text:p>
      <text:p text:style-name="P14"><text:span text:style-name="Source_20_Text"><text:span text:style-name="T14"><text:s text:c="4"/></text:span></text:span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get_next_serial</text:span></text:span><text:span text:style-name="Source_20_Text"><text:span text:style-name="T15">(cls):</text:span></text:span></text:p>
      <text:p text:style-name="P14"><text:span text:style-name="Source_20_Text"><text:span text:style-name="T14"><text:s text:c="8"/></text:span></text:span><text:span text:style-name="Source_20_Text"><text:span text:style-name="T15">cls.serial_number += </text:span></text:span><text:span text:style-name="Source_20_Text"><text:span text:style-name="T18">1</text:span></text:span></text:p>
      <text:p text:style-name="P14"><text:span text:style-name="Source_20_Text"><text:span text:style-name="T14"><text:s text:c="8"/></text:span></text:span><text:span text:style-name="Source_20_Text"><text:span text:style-name="T21">return</text:span></text:span><text:span text:style-name="Source_20_Text"><text:span text:style-name="T15"> cls.serial_number</text:span></text:span></text:p>
      <text:p text:style-name="P14"/>
      <text:p text:style-name="P14"><text:span text:style-name="Source_20_Text"><text:span text:style-name="T14"><text:s text:c="4"/></text:span></text:span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__init__</text:span></text:span><text:span text:style-name="Source_20_Text"><text:span text:style-name="T15">(self, name, price):</text:span></text:span></text:p>
      <text:p text:style-name="P14"><text:span text:style-name="Source_20_Text"><text:span text:style-name="T14"><text:s text:c="8"/></text:span></text:span><text:span text:style-name="Source_20_Text"><text:span text:style-name="T18">self</text:span></text:span><text:span text:style-name="Source_20_Text"><text:span text:style-name="T15">.name = name</text:span></text:span></text:p>
      <text:p text:style-name="P14"><text:span text:style-name="Source_20_Text"><text:span text:style-name="T14"><text:s text:c="8"/></text:span></text:span><text:span text:style-name="Source_20_Text"><text:span text:style-name="T18">self</text:span></text:span><text:span text:style-name="Source_20_Text"><text:span text:style-name="T15">.price = price</text:span></text:span></text:p>
      <text:p text:style-name="P14"><text:span text:style-name="Source_20_Text"><text:span text:style-name="T14"><text:s text:c="8"/></text:span></text:span><text:span text:style-name="Source_20_Text"><text:span text:style-name="T18">self</text:span></text:span><text:span text:style-name="Source_20_Text"><text:span text:style-name="T15">.instance_number = Product.get_next_serial()</text:span></text:span></text:p>
      <text:p text:style-name="P16"/>
      <text:h text:style-name="P2" text:outline-level="2">Overview</text:h>
      <text:h text:style-name="P9" text:outline-level="3">Special methods that begin and end with double underscore</text:h>
      <text:p text:style-name="P21"><text:span text:style-name="T6">Also called </text:span><text:span text:style-name="Strong_20_Emphasis"><text:span text:style-name="Emphasis"><text:span text:style-name="T6">dundermethods</text:span></text:span></text:span><text:span text:style-name="Emphasis"><text:span text:style-name="T6"> </text:span></text:span><text:span text:style-name="T6">(</text:span><text:span text:style-name="Strong_20_Emphasis"><text:span text:style-name="T6">d</text:span></text:span><text:span text:style-name="T6">ouble </text:span><text:span text:style-name="Strong_20_Emphasis"><text:span text:style-name="T6">under</text:span></text:span><text:span text:style-name="T6">score)</text:span></text:p>
      <text:p text:style-name="P24">Meant to be invoked by certain actions, not directly</text:p>
      <text:p text:style-name="P21"><text:span text:style-name="T6">For example, instantiating a class calls </text:span><text:span text:style-name="Source_20_Text"><text:span text:style-name="T16">__init__</text:span></text:span></text:p>
      <text:h text:style-name="P9" text:outline-level="3">More than 50 magic methods exist</text:h>
      <text:p text:style-name="P24">In certain situations, they can simplify your code</text:p>
      <text:h text:style-name="P2" text:outline-level="2">Initializer</text:h>
      <text:p text:style-name="P21"><text:span text:style-name="Source_20_Text"><text:span text:style-name="T16">__init__ </text:span></text:span><text:span text:style-name="T6">Called when a class is instantiated</text:span></text:p>
      <text:p text:style-name="P21"/>
      <text:p text:style-name="P28"/>
      <text:p text:style-name="P13"><text:soft-page-break/><text:span text:style-name="Source_20_Text"><text:span text:style-name="T21">class</text:span></text:span><text:span text:style-name="Source_20_Text"><text:span text:style-name="T15"> </text:span></text:span><text:span text:style-name="Source_20_Text"><text:span text:style-name="T19">Product</text:span></text:span><text:span text:style-name="Source_20_Text"><text:span text:style-name="T15">: <text:s text:c="2"/></text:span></text:span></text:p>
      <text:p text:style-name="P14"><text:span text:style-name="Source_20_Text"><text:span text:style-name="T14"><text:s text:c="2"/></text:span></text:span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__init__</text:span></text:span><text:span text:style-name="Source_20_Text"><text:span text:style-name="T15">(self, name, price): <text:s text:c="4"/></text:span></text:span></text:p>
      <text:p text:style-name="P14"><text:span text:style-name="Source_20_Text"><text:span text:style-name="T14"><text:s text:c="4"/></text:span></text:span><text:span text:style-name="Source_20_Text"><text:span text:style-name="T18">self</text:span></text:span><text:span text:style-name="Source_20_Text"><text:span text:style-name="T15">.name = name <text:s text:c="4"/></text:span></text:span></text:p>
      <text:p text:style-name="P14"><text:span text:style-name="Source_20_Text"><text:span text:style-name="T14"><text:s text:c="4"/></text:span></text:span><text:span text:style-name="Source_20_Text"><text:span text:style-name="T18">self</text:span></text:span><text:span text:style-name="Source_20_Text"><text:span text:style-name="T15">.price = price</text:span></text:span></text:p>
      <text:p text:style-name="P14"/>
      <text:p text:style-name="P14"><text:span text:style-name="Source_20_Text"><text:span text:style-name="T15">cheese = Product(</text:span></text:span><text:span text:style-name="Source_20_Text"><text:span text:style-name="T24">'Cheese'</text:span></text:span><text:span text:style-name="Source_20_Text"><text:span text:style-name="T15">, </text:span></text:span><text:span text:style-name="Source_20_Text"><text:span text:style-name="T18">8.00</text:span></text:span><text:span text:style-name="Source_20_Text"><text:span text:style-name="T15">) </text:span></text:span></text:p>
      <text:p text:style-name="P14"><text:span text:style-name="Source_20_Text"><text:span text:style-name="T15">wine = Product(</text:span></text:span><text:span text:style-name="Source_20_Text"><text:span text:style-name="T24">'Wine'</text:span></text:span><text:span text:style-name="Source_20_Text"><text:span text:style-name="T15">, </text:span></text:span><text:span text:style-name="Source_20_Text"><text:span text:style-name="T18">12.50</text:span></text:span><text:span text:style-name="Source_20_Text"><text:span text:style-name="T15">) </text:span></text:span></text:p>
      <text:p text:style-name="P21"><text:span text:style-name="T6">Python calls </text:span><text:span text:style-name="Source_20_Text"><text:span text:style-name="T16">__init__</text:span></text:span><text:span text:style-name="T6"> implicitly</text:span></text:p>
      <text:p text:style-name="P16"/>
      <text:h text:style-name="P2" text:outline-level="2">String representation</text:h>
      <text:p text:style-name="P21"><text:span text:style-name="Source_20_Text"><text:span text:style-name="T16">__str__ </text:span></text:span><text:span text:style-name="T6">Called when a class is converted to string explicitly or implicitly</text:span></text:p>
      <text:p text:style-name="P21"/>
      <text:p text:style-name="P27">BashC++C#CSSGoHTMLJavaJavaScriptJSONMarkdownPHPPlain TextPythonRubyRustSQLTypeScriptXMLYAML</text:p>
      <text:p text:style-name="P13"><text:span text:style-name="Source_20_Text"><text:span text:style-name="T21">class</text:span></text:span><text:span text:style-name="Source_20_Text"><text:span text:style-name="T15"> </text:span></text:span><text:span text:style-name="Source_20_Text"><text:span text:style-name="T19">Product</text:span></text:span><text:span text:style-name="Source_20_Text"><text:span text:style-name="T15">: <text:s text:c="2"/></text:span></text:span></text:p>
      <text:p text:style-name="P14"><text:span text:style-name="Source_20_Text"><text:span text:style-name="T14"><text:s text:c="2"/></text:span></text:span><text:span text:style-name="Source_20_Text"><text:span text:style-name="T15">def </text:span></text:span><text:span text:style-name="Source_20_Text"><text:span text:style-name="T22">__str__</text:span></text:span><text:span text:style-name="Source_20_Text"><text:span text:style-name="T15">(self): <text:s text:c="4"/></text:span></text:span></text:p>
      <text:p text:style-name="P14"><text:span text:style-name="Source_20_Text"><text:span text:style-name="T14"><text:s text:c="4"/></text:span></text:span><text:span text:style-name="Source_20_Text"><text:span text:style-name="T21">return</text:span></text:span><text:span text:style-name="Source_20_Text"><text:span text:style-name="T15"> f</text:span></text:span><text:span text:style-name="Source_20_Text"><text:span text:style-name="T24">'{self.name} | {self.price }'</text:span></text:span></text:p>
      <text:p text:style-name="P14"/>
      <text:p text:style-name="P14"><text:span text:style-name="Source_20_Text"><text:span text:style-name="T15">cheese = </text:span></text:span><text:span text:style-name="Source_20_Text"><text:span text:style-name="T19">Product</text:span></text:span><text:span text:style-name="Source_20_Text"><text:span text:style-name="T15">(</text:span></text:span><text:span text:style-name="Source_20_Text"><text:span text:style-name="T24">'Cheese'</text:span></text:span><text:span text:style-name="Source_20_Text"><text:span text:style-name="T15">, </text:span></text:span><text:span text:style-name="Source_20_Text"><text:span text:style-name="T18">8.00</text:span></text:span><text:span text:style-name="Source_20_Text"><text:span text:style-name="T15">)</text:span></text:span></text:p>
      <text:p text:style-name="P14"><text:span text:style-name="Source_20_Text"><text:span text:style-name="T15">cheese_as_string = </text:span></text:span><text:span text:style-name="Source_20_Text"><text:span text:style-name="T22">str</text:span></text:span><text:span text:style-name="Source_20_Text"><text:span text:style-name="T15">(cheese)</text:span></text:span></text:p>
      <text:p text:style-name="P14"><text:span text:style-name="Source_20_Text"><text:span text:style-name="T22">print</text:span></text:span><text:span text:style-name="Source_20_Text"><text:span text:style-name="T15">(cheese_as_string) </text:span></text:span></text:p>
      <text:p text:style-name="P14"><text:span text:style-name="Source_20_Text"><text:span text:style-name="T22">print</text:span></text:span><text:span text:style-name="Source_20_Text"><text:span text:style-name="T15">(cheese)</text:span></text:span></text:p>
      <text:p text:style-name="P21"/>
      <text:p text:style-name="P21"><text:span text:style-name="T6">Explicitly called by using </text:span><text:span text:style-name="Strong_20_Emphasis"><text:span text:style-name="T6">str</text:span></text:span><text:span text:style-name="T6">.</text:span></text:p>
      <text:p text:style-name="P21"/>
      <text:p text:style-name="P21"><text:span text:style-name="T6">Implicitly called by </text:span><text:span text:style-name="Strong_20_Emphasis"><text:span text:style-name="T6">print</text:span></text:span><text:span text:style-name="T6">.</text:span></text:p>
      <text:p text:style-name="P16"/>
      <text:h text:style-name="P2" text:outline-level="2">Comparing Objects</text:h>
      <text:p text:style-name="P21"><text:span text:style-name="Source_20_Text"><text:span text:style-name="T16">__eq__ </text:span></text:span></text:p>
      <text:p text:style-name="P21"><text:span text:style-name="T6">Implement when you need </text:span><text:span text:style-name="Strong_20_Emphasis"><text:span text:style-name="T6">structural comparison</text:span></text:span></text:p>
      <text:p text:style-name="P21"><text:span text:style-name="T6">Called by the </text:span><text:span text:style-name="Strong_20_Emphasis"><text:span text:style-name="T6">==</text:span></text:span><text:span text:style-name="T6"> comparison operator</text:span></text:p>
      <text:p text:style-name="P20"><text:span text:style-name="T10"/></text:p>
      <text:p text:style-name="P13"><text:span text:style-name="Source_20_Text"><text:span text:style-name="T21">class</text:span></text:span><text:span text:style-name="Source_20_Text"><text:span text:style-name="T15"> </text:span></text:span><text:span text:style-name="Source_20_Text"><text:span text:style-name="T19">Product</text:span></text:span><text:span text:style-name="Source_20_Text"><text:span text:style-name="T15">: <text:s text:c="2"/></text:span></text:span></text:p>
      <text:p text:style-name="P14"><text:soft-page-break/><text:span text:style-name="Source_20_Text"><text:span text:style-name="T14"><text:s text:c="2"/></text:span></text:span><text:span text:style-name="Source_20_Text"><text:span text:style-name="T21">def</text:span></text:span><text:span text:style-name="Source_20_Text"><text:span text:style-name="T15"> </text:span></text:span><text:span text:style-name="Source_20_Text"><text:span text:style-name="T22">__eq__</text:span></text:span><text:span text:style-name="Source_20_Text"><text:span text:style-name="T15">(self, other): <text:s text:c="4"/></text:span></text:span></text:p>
      <text:p text:style-name="P14"><text:span text:style-name="Source_20_Text"><text:span text:style-name="T14"><text:s text:c="4"/></text:span></text:span><text:span text:style-name="Source_20_Text"><text:span text:style-name="T21">if</text:span></text:span><text:span text:style-name="Source_20_Text"><text:span text:style-name="T15"> </text:span></text:span><text:span text:style-name="Source_20_Text"><text:span text:style-name="T21">not</text:span></text:span><text:span text:style-name="Source_20_Text"><text:span text:style-name="T15"> </text:span></text:span><text:span text:style-name="Source_20_Text"><text:span text:style-name="T19">isinstance</text:span></text:span><text:span text:style-name="Source_20_Text"><text:span text:style-name="T15">(other, Product): <text:s text:c="6"/></text:span></text:span></text:p>
      <text:p text:style-name="P14"><text:span text:style-name="Source_20_Text"><text:span text:style-name="T14"><text:s text:c="6"/></text:span></text:span><text:span text:style-name="Source_20_Text"><text:span text:style-name="T21">return</text:span></text:span><text:span text:style-name="Source_20_Text"><text:span text:style-name="T15"> </text:span></text:span><text:span text:style-name="Source_20_Text"><text:span text:style-name="T25">False</text:span></text:span></text:p>
      <text:p text:style-name="P14"/>
      <text:p text:style-name="P14"><text:span text:style-name="Source_20_Text"><text:span text:style-name="T14"><text:s text:c="4"/></text:span></text:span><text:span text:style-name="Source_20_Text"><text:span text:style-name="T21">return</text:span></text:span><text:span text:style-name="Source_20_Text"><text:span text:style-name="T15"> (</text:span></text:span><text:span text:style-name="Source_20_Text"><text:span text:style-name="T18">self</text:span></text:span><text:span text:style-name="Source_20_Text"><text:span text:style-name="T15">.name == other.name <text:s text:c="8"/></text:span></text:span></text:p>
      <text:p text:style-name="P14"><text:span text:style-name="Source_20_Text"><text:span text:style-name="T14"><text:s text:c="4"/></text:span></text:span><text:span text:style-name="Source_20_Text"><text:span text:style-name="T21">and</text:span></text:span><text:span text:style-name="Source_20_Text"><text:span text:style-name="T15"> </text:span></text:span><text:span text:style-name="Source_20_Text"><text:span text:style-name="T18">self</text:span></text:span><text:span text:style-name="Source_20_Text"><text:span text:style-name="T15">.price == other.price)</text:span>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SF Pro Display', apple-system, BlinkMacSystemFont, 'Open Sans'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oppins" svg:font-family="Poppins, Montserrat, sans-serif"/>
    <style:font-face style:name="monospace" svg:font-family="monospace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2T07:20:49.959000000</meta:creation-date>
    <dc:date>2026-07-22T07:51:25.490000000</dc:date>
    <meta:editing-duration>PT10M14S</meta:editing-duration>
    <meta:editing-cycles>2</meta:editing-cycles>
    <meta:generator>LibreOffice/7.3.4.2$Windows_X86_64 LibreOffice_project/728fec16bd5f605073805c3c9e7c4212a0120dc5</meta:generator>
    <meta:document-statistic meta:table-count="1" meta:image-count="0" meta:object-count="0" meta:page-count="9" meta:paragraph-count="213" meta:word-count="968" meta:character-count="7257" meta:non-whitespace-character-count="6194"/>
  </office:meta>
</office:document-meta>
</file>