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6000001EC409D3DE1BCD43226.png" manifest:media-type="image/png"/>
  <manifest:file-entry manifest:full-path="Pictures/100000010000043600000220745AEB15C41D39B6.png" manifest:media-type="image/png"/>
  <manifest:file-entry manifest:full-path="Pictures/10000001000003A1000001AD797E86D5AFA94A4A.png" manifest:media-type="image/png"/>
  <manifest:file-entry manifest:full-path="Pictures/10000001000002E5000001B122124FEE2F01C239.png" manifest:media-type="image/png"/>
  <manifest:file-entry manifest:full-path="Pictures/100000010000032B000001546105CA1759FC51D3.png" manifest:media-type="image/png"/>
  <manifest:file-entry manifest:full-path="Pictures/10000001000003E7000001BE5C3F41ED0297BEEB.png" manifest:media-type="image/png"/>
  <manifest:file-entry manifest:full-path="Pictures/1000000100000448000001C13FA06B31B813B967.png" manifest:media-type="image/png"/>
  <manifest:file-entry manifest:full-path="Pictures/10000001000003F6000001DBE8DA1E7B8E77C7C6.png" manifest:media-type="image/png"/>
  <manifest:file-entry manifest:full-path="Pictures/100000010000043E0000018B9F0B3BD61CCC17A5.png" manifest:media-type="image/png"/>
  <manifest:file-entry manifest:full-path="Pictures/10000001000003BC000001D09E23CE31B3C86C24.png" manifest:media-type="image/png"/>
  <manifest:file-entry manifest:full-path="Pictures/10000001000003F00000024C5DE395F7ED11420F.png" manifest:media-type="image/png"/>
  <manifest:file-entry manifest:full-path="Pictures/10000001000002C000000244C8B68A37AFB1621F.png" manifest:media-type="image/png"/>
  <manifest:file-entry manifest:full-path="Pictures/100000010000028A000002632ACD1616CE9B6520.png" manifest:media-type="image/png"/>
  <manifest:file-entry manifest:full-path="Pictures/10000001000004430000018F2F98DD69D3FE2803.png" manifest:media-type="image/png"/>
  <manifest:file-entry manifest:full-path="Pictures/100000010000028800000203A60312EA8C334806.png" manifest:media-type="image/png"/>
  <manifest:file-entry manifest:full-path="Pictures/10000001000003BB0000016214556A6CD413C848.png" manifest:media-type="image/png"/>
  <manifest:file-entry manifest:full-path="Pictures/10000001000004080000016DC01FD9B803DDE1C0.png" manifest:media-type="image/png"/>
  <manifest:file-entry manifest:full-path="Pictures/10000001000003D700000210CD20995368C4F6AF.png" manifest:media-type="image/png"/>
  <manifest:file-entry manifest:full-path="Pictures/10000001000003330000025CCD3475FEC99475F0.png" manifest:media-type="image/png"/>
  <manifest:file-entry manifest:full-path="Pictures/100000010000031700000180497454136B7BF5CC.png" manifest:media-type="image/png"/>
  <manifest:file-entry manifest:full-path="Pictures/10000001000005250000021D19E3A3ED1490691E.png" manifest:media-type="image/png"/>
  <manifest:file-entry manifest:full-path="Pictures/10000001000003D30000013E0E5F00F0A98DAEE7.png" manifest:media-type="image/png"/>
  <manifest:file-entry manifest:full-path="Pictures/1000000100000380000001AE7C3DB5387574A98E.png" manifest:media-type="image/png"/>
  <manifest:file-entry manifest:full-path="Pictures/10000001000002C900000266D6B532C8771B08D2.png" manifest:media-type="image/png"/>
  <manifest:file-entry manifest:full-path="Pictures/10000001000003C2000002583ABD08E38E785E4D.png" manifest:media-type="image/png"/>
  <manifest:file-entry manifest:full-path="Pictures/10000001000003CC000001E7EBC8A971DA5FD0E5.png" manifest:media-type="image/png"/>
  <manifest:file-entry manifest:full-path="Pictures/100000010000036D0000023640F4F6E788B478F7.png" manifest:media-type="image/png"/>
  <manifest:file-entry manifest:full-path="Pictures/10000001000003970000026C4F1329FFEF8431CE.png" manifest:media-type="image/png"/>
  <manifest:file-entry manifest:full-path="Pictures/10000001000003DE0000021C3670219744C9F4B9.png" manifest:media-type="image/png"/>
  <manifest:file-entry manifest:full-path="Pictures/10000001000004F800000237A747DD2FF2F1428D.png" manifest:media-type="image/png"/>
  <manifest:file-entry manifest:full-path="Pictures/10000001000004410000011C5FE7A1E78CA02085.png" manifest:media-type="image/png"/>
  <manifest:file-entry manifest:full-path="Pictures/100000010000044B00000246C5B607FC5BA90D42.png" manifest:media-type="image/png"/>
  <manifest:file-entry manifest:full-path="Pictures/100000010000045D000002019392CCFFF475320C.png" manifest:media-type="image/png"/>
  <manifest:file-entry manifest:full-path="Pictures/10000001000003D7000001DE839099CEBD46319A.png" manifest:media-type="image/png"/>
  <manifest:file-entry manifest:full-path="Pictures/10000001000003B200000200BEA3A39907EDC0C8.png" manifest:media-type="image/png"/>
  <manifest:file-entry manifest:full-path="Pictures/10000001000003B30000023515DDDD3A152EC40A.png" manifest:media-type="image/png"/>
  <manifest:file-entry manifest:full-path="Pictures/10000001000003300000025DAF7875C1E4CC5A2D.png" manifest:media-type="image/png"/>
  <manifest:file-entry manifest:full-path="Pictures/100000010000039400000294853A01BA23227151.png" manifest:media-type="image/png"/>
  <manifest:file-entry manifest:full-path="Pictures/100000010000040600000200DB5D8EA427246173.png" manifest:media-type="image/png"/>
  <manifest:file-entry manifest:full-path="Pictures/10000001000004EE000001F4E982329CA549B469.png" manifest:media-type="image/png"/>
  <manifest:file-entry manifest:full-path="Pictures/100000010000035E000001A2DCD694487570F3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Montserrat, sans-serif"/>
    <style:font-face style:name="source-code-pro" svg:font-family="source-code-pro, Menlo, Monaco, Consolas, 'Courier New', monospace"/>
  </office:font-face-decls>
  <office:automatic-styles>
    <style:style style:name="Table1" style:family="table">
      <style:table-properties style:width="2.884cm" fo:margin-left="1.251cm" table:align="left"/>
    </style:style>
    <style:style style:name="Table1.A" style:family="table-column">
      <style:table-column-properties style:column-width="2.88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577cm" fo:margin-left="1.251cm" table:align="left"/>
    </style:style>
    <style:style style:name="Table2.A" style:family="table-column">
      <style:table-column-properties style:column-width="3.57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718cm" fo:margin-left="1.251cm" table:align="left"/>
    </style:style>
    <style:style style:name="Table3.A" style:family="table-column">
      <style:table-column-properties style:column-width="3.71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5.018cm" fo:margin-left="1.251cm" table:align="left"/>
    </style:style>
    <style:style style:name="Table4.A" style:family="table-column">
      <style:table-column-properties style:column-width="5.01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013cm" table:align="left"/>
    </style:style>
    <style:style style:name="Table5.A" style:family="table-column">
      <style:table-column-properties style:column-width="6.013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5.749cm" table:align="left"/>
    </style:style>
    <style:style style:name="Table6.A" style:family="table-column">
      <style:table-column-properties style:column-width="5.749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3.676cm" table:align="left"/>
    </style:style>
    <style:style style:name="Table7.A" style:family="table-column">
      <style:table-column-properties style:column-width="3.676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5.683cm" table:align="left"/>
    </style:style>
    <style:style style:name="Table8.A" style:family="table-column">
      <style:table-column-properties style:column-width="5.683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7.798cm" table:align="left"/>
    </style:style>
    <style:style style:name="Table9.A" style:family="table-column">
      <style:table-column-properties style:column-width="7.798cm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9.499cm" table:align="left"/>
    </style:style>
    <style:style style:name="Table10.A" style:family="table-column">
      <style:table-column-properties style:column-width="2.104cm"/>
    </style:style>
    <style:style style:name="Table10.B" style:family="table-column">
      <style:table-column-properties style:column-width="1.997cm"/>
    </style:style>
    <style:style style:name="Table10.C" style:family="table-column">
      <style:table-column-properties style:column-width="2.593cm"/>
    </style:style>
    <style:style style:name="Table10.D" style:family="table-column">
      <style:table-column-properties style:column-width="2.805cm"/>
    </style:style>
    <style:style style:name="Table10.A1" style:family="table-cell">
      <style:table-cell-properties style:vertical-align="middle" fo:padding-left="0.318cm" fo:padding-right="0.318cm" fo:padding-top="0.169cm" fo:padding-bottom="0.169cm" fo:border="0.05pt solid #d0d5dd"/>
    </style:style>
    <style:style style:name="Table10.3" style:family="table-row">
      <style:table-row-properties fo:background-color="#f9fafb">
        <style:background-image/>
      </style:table-row-properties>
    </style:style>
    <style:style style:name="Table11" style:family="table">
      <style:table-properties style:width="13.227cm" table:align="left"/>
    </style:style>
    <style:style style:name="Table11.A" style:family="table-column">
      <style:table-column-properties style:column-width="2.235cm"/>
    </style:style>
    <style:style style:name="Table11.B" style:family="table-column">
      <style:table-column-properties style:column-width="2.766cm"/>
    </style:style>
    <style:style style:name="Table11.C" style:family="table-column">
      <style:table-column-properties style:column-width="8.227cm"/>
    </style:style>
    <style:style style:name="Table11.A1" style:family="table-cell">
      <style:table-cell-properties style:vertical-align="middle" fo:padding-left="0.318cm" fo:padding-right="0.318cm" fo:padding-top="0.169cm" fo:padding-bottom="0.169cm" fo:border="0.05pt solid #d0d5dd"/>
    </style:style>
    <style:style style:name="Table11.3" style:family="table-row">
      <style:table-row-properties fo:background-color="#f9fafb">
        <style:background-image/>
      </style:table-row-properties>
    </style:style>
    <style:style style:name="Table12" style:family="table">
      <style:table-properties style:width="2.593cm" table:align="left"/>
    </style:style>
    <style:style style:name="Table12.A" style:family="table-column">
      <style:table-column-properties style:column-width="2.593cm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4.434cm" table:align="left"/>
    </style:style>
    <style:style style:name="Table13.A" style:family="table-column">
      <style:table-column-properties style:column-width="4.434cm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4.551cm" table:align="left"/>
    </style:style>
    <style:style style:name="Table14.A" style:family="table-column">
      <style:table-column-properties style:column-width="4.551cm"/>
    </style:style>
    <style:style style:name="Table14.A1" style:family="table-cell">
      <style:table-cell-properties style:vertical-align="middle" fo:padding="0cm" fo:border="none"/>
    </style:style>
    <style:style style:name="P1" style:family="paragraph" style:parent-style-name="Standard">
      <style:text-properties fo:language="bg" fo:country="BG" officeooo:rsid="0011fed0" officeooo:paragraph-rsid="0011fed0"/>
    </style:style>
    <style:style style:name="P2" style:family="paragraph" style:parent-style-name="Heading_20_2">
      <style:paragraph-properties>
        <style:tab-stops>
          <style:tab-stop style:position="3.731cm"/>
        </style:tab-stops>
      </style:paragraph-properties>
      <style:text-properties fo:font-size="12pt" fo:language="en" fo:country="US" fo:font-weight="normal" officeooo:rsid="00197ee0" officeooo:paragraph-rsid="00197ee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8pt" fo:language="bg" fo:country="BG" fo:font-weight="bold" officeooo:rsid="00150db8" officeooo:paragraph-rsid="00150db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language="en" fo:country="US" fo:font-weight="bold" officeooo:rsid="00150db8" officeooo:paragraph-rsid="00150db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language="en" fo:country="US" fo:font-weight="bold" officeooo:rsid="00162a6b" officeooo:paragraph-rsid="00162a6b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language="en" fo:country="US" fo:font-weight="bold" officeooo:rsid="0017a563" officeooo:paragraph-rsid="0017a563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language="en" fo:country="US" fo:font-weight="bold" officeooo:rsid="00197ee0" officeooo:paragraph-rsid="00197ee0" style:font-size-asian="18pt" style:font-weight-asian="bold" style:font-size-complex="18pt" style:font-weight-complex="bold"/>
    </style:style>
    <style:style style:name="P8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a8903" officeooo:paragraph-rsid="001a8903" style:font-size-asian="15.75pt" style:font-weight-asian="bold" style:font-size-complex="18pt" style:font-weight-complex="bold"/>
    </style:style>
    <style:style style:name="P9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bc7f0" officeooo:paragraph-rsid="001bc7f0" style:font-size-asian="15.75pt" style:font-weight-asian="bold" style:font-size-complex="18pt" style:font-weight-complex="bold"/>
    </style:style>
    <style:style style:name="P10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ccb59" officeooo:paragraph-rsid="001ccb59" style:font-size-asian="15.75pt" style:font-weight-asian="bold" style:font-size-complex="18pt" style:font-weight-complex="bold"/>
    </style:style>
    <style:style style:name="P11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d55ce" officeooo:paragraph-rsid="001d55ce" style:font-size-asian="15.75pt" style:font-weight-asian="bold" style:font-size-complex="18pt" style:font-weight-complex="bold"/>
    </style:style>
    <style:style style:name="P12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edae8" officeooo:paragraph-rsid="001edae8" style:font-size-asian="15.75pt" style:font-weight-asian="bold" style:font-size-complex="18pt" style:font-weight-complex="bold"/>
    </style:style>
    <style:style style:name="P13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fa929" officeooo:paragraph-rsid="001fa929" style:font-size-asian="15.75pt" style:font-weight-asian="bold" style:font-size-complex="18pt" style:font-weight-complex="bold"/>
    </style:style>
    <style:style style:name="P14" style:family="paragraph" style:parent-style-name="Heading_20_1">
      <style:paragraph-properties>
        <style:tab-stops>
          <style:tab-stop style:position="3.731cm"/>
        </style:tab-stops>
      </style:paragraph-properties>
      <style:text-properties fo:font-variant="normal" fo:text-transform="none" fo:color="#101828" loext:opacity="100%" style:font-name="Poppins" fo:font-size="18pt" fo:letter-spacing="normal" fo:language="en" fo:country="US" fo:font-style="normal" fo:font-weight="normal" officeooo:rsid="0020564e" officeooo:paragraph-rsid="0020564e" style:font-size-asian="15.75pt" style:font-weight-asian="bold" style:font-size-complex="18pt" style:font-weight-complex="bold"/>
    </style:style>
    <style:style style:name="P15" style:family="paragraph" style:parent-style-name="Heading_20_1">
      <style:paragraph-properties>
        <style:tab-stops>
          <style:tab-stop style:position="3.731cm"/>
        </style:tab-stops>
      </style:paragraph-properties>
      <style:text-properties fo:font-size="18pt" fo:language="en" fo:country="US" fo:font-weight="normal" officeooo:rsid="0020564e" officeooo:paragraph-rsid="0020564e" style:font-size-asian="15.75pt" style:font-weight-asian="bold" style:font-size-complex="18pt" style:font-weight-complex="bold"/>
    </style:style>
    <style:style style:name="P16" style:family="paragraph" style:parent-style-name="Heading_20_1">
      <style:paragraph-properties>
        <style:tab-stops>
          <style:tab-stop style:position="3.731cm"/>
        </style:tab-stops>
      </style:paragraph-properties>
      <style:text-properties fo:font-size="18pt" fo:language="en" fo:country="US" fo:font-weight="normal" officeooo:rsid="0020564e" officeooo:paragraph-rsid="0020564e" style:font-size-asian="18pt" style:font-weight-asian="bold" style:font-size-complex="18pt" style:font-weight-complex="bold"/>
    </style:style>
    <style:style style:name="P17" style:family="paragraph" style:parent-style-name="Heading_20_1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21a208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21a208"/>
    </style:style>
    <style:style style:name="P20" style:family="paragraph" style:parent-style-name="Standard" style:list-style-name="L1">
      <style:paragraph-properties fo:margin-top="0cm" fo:margin-bottom="0cm" style:contextual-spacing="false"/>
      <style:text-properties fo:font-size="2pt" style:font-size-asian="2pt" style:font-size-complex="2pt"/>
    </style:style>
    <style:style style:name="P21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fa929" officeooo:paragraph-rsid="001fa929" style:font-size-asian="15.75pt" style:font-weight-asian="bold" style:font-size-complex="18pt" style:font-weight-complex="bold"/>
    </style:style>
    <style:style style:name="P22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1edae8" officeooo:paragraph-rsid="001edae8" style:font-size-asian="15.75pt" style:font-weight-asian="bold" style:font-size-complex="18pt" style:font-weight-complex="bold"/>
    </style:style>
    <style:style style:name="P23" style:family="paragraph" style:parent-style-name="Standard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20564e" officeooo:paragraph-rsid="0020564e" style:font-size-asian="15.75pt" style:font-weight-asian="bold" style:font-size-complex="18pt" style:font-weight-complex="bold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</style:style>
    <style:style style:name="P3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21a208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4" style:family="paragraph" style:parent-style-name="Text_20_body">
      <style:paragraph-properties>
        <style:tab-stops>
          <style:tab-stop style:position="3.731cm"/>
        </style:tab-stops>
      </style:paragraph-properties>
      <style:text-properties fo:font-size="18pt" fo:language="en" fo:country="US" fo:font-weight="bold" officeooo:rsid="0020564e" officeooo:paragraph-rsid="0020564e" style:font-size-asian="15.75pt" style:font-weight-asian="bold" style:font-size-complex="18pt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6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8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39" style:family="paragraph" style:parent-style-name="Text_20_body" style:list-style-name="L8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40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41" style:family="paragraph" style:parent-style-name="Text_20_body" style:list-style-name="L9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42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43" style:family="paragraph" style:parent-style-name="Text_20_body" style:list-style-name="L10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3.731cm"/>
        </style:tab-stops>
      </style:paragraph-properties>
      <style:text-properties fo:font-variant="normal" fo:text-transform="none" fo:color="#101828" loext:opacity="100%" style:font-name="Poppins" fo:font-size="12pt" fo:letter-spacing="normal" fo:language="en" fo:country="US" fo:font-style="normal" fo:font-weight="normal" officeooo:rsid="0020564e" officeooo:paragraph-rsid="0020564e" style:font-size-asian="15.75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ource-code-pro" fo:background-color="#f2f4f7" loext:char-shading-value="0" loext:padding="0cm" loext:border="none"/>
    </style:style>
    <style:style style:name="T4" style:family="text">
      <style:text-properties fo:font-variant="normal" fo:text-transform="none" fo:color="#101828" loext:opacity="100%" style:font-name="Poppins" fo:font-size="12pt" fo:letter-spacing="normal" fo:font-style="normal" fo:font-weight="normal"/>
    </style:style>
    <style:style style:name="T5" style:family="text">
      <style:text-properties fo:font-variant="normal" fo:text-transform="none" fo:color="#101828" loext:opacity="100%" style:font-name="Poppins" fo:font-size="12pt" fo:letter-spacing="normal" fo:language="en" fo:country="US" fo:font-style="normal" fo:font-weight="normal" officeooo:rsid="0021a208" fo:background-color="#f2f4f7" loext:char-shading-value="0" loext:padding="0cm" loext:border="none"/>
    </style:style>
    <style:style style:name="T6" style:family="text">
      <style:text-properties fo:font-variant="normal" fo:text-transform="none" fo:color="#101828" loext:opacity="100%" style:font-name="Poppins" fo:letter-spacing="normal" fo:font-style="normal"/>
    </style:style>
    <style:style style:name="T7" style:family="text">
      <style:text-properties fo:font-variant="normal" fo:text-transform="none" fo:color="#101828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8" style:family="text">
      <style:text-properties fo:font-variant="normal" fo:text-transform="none" fo:color="#383a42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9" style:family="text">
      <style:text-properties fo:font-variant="normal" fo:text-transform="none" fo:color="#986801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0" style:family="text">
      <style:text-properties fo:font-variant="normal" fo:text-transform="none" fo:color="#50a14f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1" style:family="text">
      <style:text-properties fo:font-variant="normal" fo:text-transform="none" fo:color="#50a14f" loext:opacity="100%" style:font-name="source-code-pro" fo:font-size="12pt" fo:letter-spacing="normal" fo:language="en" fo:country="US" fo:font-style="normal" fo:font-weight="normal" officeooo:rsid="0021a208" fo:background-color="#f2f4f7" loext:char-shading-value="0" loext:padding="0cm" loext:border="none"/>
    </style:style>
    <style:style style:name="T12" style:family="text">
      <style:text-properties fo:font-variant="normal" fo:text-transform="none" fo:color="#50a14f" loext:opacity="100%" style:font-name="source-code-pro" fo:font-size="12pt" fo:letter-spacing="normal" fo:language="en" fo:country="US" fo:font-style="normal" fo:font-weight="normal" officeooo:rsid="0021a208" fo:background-color="#f2f4f7" loext:char-shading-value="0" style:font-size-asian="10pt" style:font-size-complex="10pt" loext:padding="0cm" loext:border="none"/>
    </style:style>
    <style:style style:name="T13" style:family="text">
      <style:text-properties fo:font-variant="normal" fo:text-transform="none" fo:color="#50a14f" loext:opacity="100%" fo:font-size="12pt" fo:letter-spacing="normal" fo:language="en" fo:country="US" fo:font-style="normal" fo:font-weight="normal" officeooo:rsid="0021a208" fo:background-color="#f2f4f7" loext:char-shading-value="0" loext:padding="0cm" loext:border="none"/>
    </style:style>
    <style:style style:name="T14" style:family="text">
      <style:text-properties fo:font-variant="normal" fo:text-transform="none" fo:color="#a0a1a7" loext:opacity="100%" style:font-name="source-code-pro" fo:font-size="12pt" fo:letter-spacing="normal" fo:font-style="italic" fo:font-weight="normal" fo:background-color="#f2f4f7" loext:char-shading-value="0" loext:padding="0cm" loext:border="none"/>
    </style:style>
    <style:style style:name="T15" style:family="text">
      <style:text-properties fo:color="#c18401" loext:opacity="100%"/>
    </style:style>
    <style:style style:name="T16" style:family="text">
      <style:text-properties fo:color="#986801" loext:opacity="100%"/>
    </style:style>
    <style:style style:name="T17" style:family="text">
      <style:text-properties fo:color="#a0a1a7" loext:opacity="100%" fo:font-style="italic"/>
    </style:style>
    <style:style style:name="T18" style:family="text">
      <style:text-properties fo:color="#50a14f" loext:opacity="100%"/>
    </style:style>
    <style:style style:name="T19" style:family="text">
      <style:text-properties fo:color="#a626a4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<text:span text:style-name="T1">Variables</text:span></text:p>
      <text:p text:style-name="P1"/>
      <text:p text:style-name="P1"><draw:frame draw:style-name="fr1" draw:name="Image1" text:anchor-type="char" svg:x="0.016cm" svg:y="0.171cm" svg:width="10.867cm" svg:height="5.112cm" draw:z-index="0"><draw:image xlink:href="Pictures/1000000100000416000001EC409D3DE1BCD432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049cm" svg:y="0.385cm" svg:width="12.414cm" svg:height="6.264cm" draw:z-index="1"><draw:image xlink:href="Pictures/100000010000043600000220745AEB15C41D39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03cm" svg:y="0.395cm" svg:width="12.457cm" svg:height="5.752cm" draw:z-index="2"><draw:image xlink:href="Pictures/10000001000003A1000001AD797E86D5AFA94A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123cm" svg:y="0.028cm" svg:width="13.555cm" svg:height="6.05cm" draw:z-index="3"><draw:image xlink:href="Pictures/10000001000003E7000001BE5C3F41ED0297BE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2. Code Structure</text:p>
      <text:p text:style-name="P4"><draw:frame draw:style-name="fr1" draw:name="Image5" text:anchor-type="char" svg:x="-0.065cm" svg:y="0.268cm" svg:width="12.45cm" svg:height="5.831cm" draw:z-index="4"><draw:image xlink:href="Pictures/10000001000003F6000001DBE8DA1E7B8E77C7C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x="0.005cm" svg:y="0.665cm" svg:width="12.598cm" svg:height="6.114cm" draw:z-index="5"><draw:image xlink:href="Pictures/10000001000003BC000001D09E23CE31B3C86C2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Using variables demo</text:p>
      <text:p text:style-name="P5"><draw:frame draw:style-name="fr1" draw:name="Image7" text:anchor-type="char" svg:x="-0.044cm" svg:y="0.492cm" svg:width="12.144cm" svg:height="5.092cm" draw:z-index="6"><draw:image xlink:href="Pictures/100000010000032B000001546105CA1759FC51D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Exchange variables exercise</text:p>
      <text:p text:style-name="P6"><draw:frame draw:style-name="fr1" draw:name="Image8" text:anchor-type="char" svg:x="0.026cm" svg:y="0.131cm" svg:width="8.25cm" svg:height="4.821cm" draw:z-index="7"><draw:image xlink:href="Pictures/10000001000002E5000001B122124FEE2F01C23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7"><text:soft-page-break/>Judge</text:p>
      <text:h text:style-name="P2" text:outline-level="2"><text:bookmark text:name="yui_3_17_2_1_1780838311666_30"/>Potential problems with Judge</text:h>
      <text:p text:style-name="Text_20_body">The system where you submit your solutions is called <text:span text:style-name="Strong_20_Emphasis">Judge</text:span> and it runs on an older Python version. In some cases, this might cause a confusing situation where your code executes successfully on your end, but you get an <text:span text:style-name="Strong_20_Emphasis">Invalid Return</text:span> error as a result. In case this happens, you should try to think of another solution.</text:p>
      <text:p text:style-name="Text_20_body">Examples for this might be:</text:p>
      <text:list xml:id="list3879099904" text:style-name="L1">
        <text:list-item>
          <text:p text:style-name="P25"><text:bookmark text:name="yui_3_17_2_1_1780838311666_36"/><text:bookmark text:name="yui_3_17_2_1_1780838311666_37"/>Python's match-case code structure:</text:p>
          <text:p text:style-name="P20"><text:bookmark text:name="yui_3_17_2_1_1780838311666_34"/><text:bookmark text:name="yui_3_17_2_1_1780838311666_35"/></text:p>
        </text:list-item>
      </text:list>
      <table:table table:name="Table1" table:style-name="Table1">
        <table:table-column table:style-name="Table1.A"/>
        <table:table-row table:style-name="TableLine2213433742704">
          <table:table-cell table:style-name="Table1.A1" office:value-type="string">
            <text:p text:style-name="Table_20_Contents">num = 1</text:p>
          </table:table-cell>
        </table:table-row>
        <table:table-row table:style-name="TableLine2213433747888">
          <table:table-cell table:style-name="Table1.A1" office:value-type="string">
            <text:p text:style-name="Table_20_Contents">match num:</text:p>
          </table:table-cell>
        </table:table-row>
        <table:table-row table:style-name="TableLine2213433745584">
          <table:table-cell table:style-name="Table1.A1" office:value-type="string">
            <text:p text:style-name="Table_20_Contents">case 1:</text:p>
          </table:table-cell>
        </table:table-row>
        <table:table-row table:style-name="TableLine2213433741264">
          <table:table-cell table:style-name="Table1.A1" office:value-type="string">
            <text:p text:style-name="Table_20_Contents">print("yes")</text:p>
          </table:table-cell>
        </table:table-row>
        <table:table-row table:style-name="TableLine2213433743856">
          <table:table-cell table:style-name="Table1.A1" office:value-type="string">
            <text:p text:style-name="Table_20_Contents">case 2:</text:p>
          </table:table-cell>
        </table:table-row>
        <table:table-row table:style-name="TableLine2213433740400">
          <table:table-cell table:style-name="Table1.A1" office:value-type="string">
            <text:p text:style-name="Table_20_Contents">print("no")</text:p>
          </table:table-cell>
        </table:table-row>
        <table:table-row table:style-name="TableLine2213433751920">
          <table:table-cell table:style-name="Table1.A1" office:value-type="string">
            <text:p text:style-name="Table_20_Contents">case _:</text:p>
          </table:table-cell>
        </table:table-row>
        <table:table-row table:style-name="TableLine2213433754224">
          <table:table-cell table:style-name="Table1.A1" office:value-type="string">
            <text:p text:style-name="Table_20_Contents">print("default")</text:p>
          </table:table-cell>
        </table:table-row>
      </table:table>
      <text:list xml:id="list75429209179351" text:continue-numbering="true" text:style-name="L1">
        <text:list-item>
          <text:list>
            <text:list-item>
              <text:p text:style-name="P26">Use if-else statements instead.</text:p>
            </text:list-item>
          </text:list>
        </text:list-item>
        <text:list-item>
          <text:p text:style-name="P25">Multiple type hints for a single variable:</text:p>
        </text:list-item>
      </text:list>
      <table:table table:name="Table2" table:style-name="Table2">
        <table:table-column table:style-name="Table2.A"/>
        <table:table-row table:style-name="TableLine2213433754512">
          <table:table-cell table:style-name="Table2.A1" office:value-type="string">
            <text:p text:style-name="Table_20_Contents">num: int | None = 1</text:p>
          </table:table-cell>
        </table:table-row>
        <table:table-row table:style-name="TableLine2213433750192">
          <table:table-cell table:style-name="Table2.A1" office:value-type="string">
            <text:p text:style-name="Table_20_Contents">print(num)</text:p>
          </table:table-cell>
        </table:table-row>
      </table:table>
      <text:list xml:id="list75429617739533" text:continue-numbering="true" text:style-name="L1">
        <text:list-item>
          <text:list>
            <text:list-item>
              <text:p text:style-name="P26">The problem here is the <text:span text:style-name="Source_20_Text">|</text:span> in the type hint. Use a maximum of one type per type hint.</text:p>
            </text:list-item>
          </text:list>
        </text:list-item>
        <text:list-item>
          <text:p text:style-name="P25">Declaring strings in f-strings:</text:p>
        </text:list-item>
      </text:list>
      <table:table table:name="Table3" table:style-name="Table3">
        <table:table-column table:style-name="Table3.A"/>
        <table:table-row table:style-name="TableLine2213433742992">
          <table:table-cell table:style-name="Table3.A1" office:value-type="string">
            <text:p text:style-name="Table_20_Contents">print(f"foo{"bar"}")</text:p>
          </table:table-cell>
        </table:table-row>
      </table:table>
      <text:list xml:id="list75428522192109" text:continue-numbering="true" text:style-name="L1">
        <text:list-item>
          <text:list>
            <text:list-item>
              <text:p text:style-name="P26">If you need to embed a string in another string, mix the quotes you use to declare them. If the outer ones are double quotes (<text:span text:style-name="Source_20_Text">"</text:span>), the inner should be single (<text:span text:style-name="Source_20_Text">'</text:span>).</text:p>
            </text:list-item>
          </text:list>
        </text:list-item>
        <text:list-item>
          <text:p text:style-name="P25">Backslashes in f-strings:</text:p>
        </text:list-item>
      </text:list>
      <table:table table:name="Table4" table:style-name="Table4">
        <table:table-column table:style-name="Table4.A"/>
        <table:table-row table:style-name="TableLine2213433746448">
          <table:table-cell table:style-name="Table4.A1" office:value-type="string">
            <text:p text:style-name="Table_20_Contents">print(f"{'\n'.join(['a', 'b'])}")</text:p>
          </table:table-cell>
        </table:table-row>
      </table:table>
      <text:list xml:id="list75428648033584" text:continue-numbering="true" text:style-name="L1">
        <text:list-item>
          <text:list>
            <text:list-item>
              <text:p text:style-name="P25">If you need to format a string like this, you should store the <text:span text:style-name="Source_20_Text">\n</text:span> separator in a variable and use it in the f-string instead of declaring it directly in it.</text:p>
            </text:list-item>
          </text:list>
        </text:list-item>
      </text:list>
      <text:p text:style-name="Text_20_body">These examples are just a few, which will execute normally if you have installed Python's latest version, but <text:span text:style-name="Strong_20_Emphasis">Judge</text:span> does <text:span text:style-name="Strong_20_Emphasis">not</text:span> support them and you will get a result similar to this:</text:p>
      <text:p text:style-name="Text_20_body"><draw:frame draw:style-name="fr2" draw:name="Image9" text:anchor-type="as-char" svg:width="2cm" svg:height="1cm" draw:z-index="8"><draw:image xlink:href="https://learn.telerikacademy.com/pluginfile.php/143223/mod_page/content/16/invalid%20return.png" xlink:type="simple" xlink:show="embed" xlink:actuate="onLoad"/><svg:title>invalid return</svg:title></draw:frame></text:p>
      <text:p text:style-name="Text_20_body"/>
      <text:h text:style-name="Heading_20_2" text:outline-level="2">Error messages from our system</text:h>
      <text:p text:style-name="Text_20_body">There are several error messages that might appear when you submit your solution. Here is a brief explanation of the most common ones.</text:p>
      <text:p text:style-name="Text_20_body"><text:soft-page-break/><text:span text:style-name="Strong_20_Emphasis">Wrong Answer</text:span></text:p>
      <text:p text:style-name="Text_20_body">The program compiled and ran correctly but the output it produced to one or more test cases was wrong.</text:p>
      <text:p text:style-name="Text_20_body"><text:span text:style-name="Strong_20_Emphasis">Invalid Return</text:span></text:p>
      <text:p text:style-name="Text_20_body">This usually occurs when your program has returned something that is not expected. Most often this is caused by some kind of an exception or an error from your program.</text:p>
      <text:p text:style-name="Text_20_body"><text:span text:style-name="Strong_20_Emphasis">Time limit exceeded</text:span></text:p>
      <text:p text:style-name="Text_20_body">All tasks and their test cases have a certain amount of time to be completed. If you see this error, your program took too long to execute.</text:p>
      <text:p text:style-name="Text_20_body"><text:span text:style-name="Strong_20_Emphasis">Memory Limit Exceeded</text:span></text:p>
      <text:p text:style-name="Text_20_body">Just like the time limit, there is a certain amount of memory that can be allocated for each task. If you get this error, your program ran out of memory.</text:p>
      <text:p text:style-name="Text_20_body"><text:span text:style-name="Strong_20_Emphasis">Compile error</text:span></text:p>
      <text:p text:style-name="Text_20_body">There is a syntax error in your code. This might be caused due to missing and/or an extra bracket somewhere, importing the wrong package, etc. Usually, there is additional information that comes with this status that <text:span text:style-name="T2">helps</text:span> you navigate to the place of error.</text:p>
      <text:p text:style-name="Text_20_body"><text:span text:style-name="Strong_20_Emphasis">Short Circuit</text:span></text:p>
      <text:p text:style-name="Text_20_body">For some tasks, judging will be terminated if any of the first few tests fail.</text:p>
      <text:p text:style-name="P8">Data types</text:p>
      <text:p text:style-name="P8"><draw:frame draw:style-name="fr1" draw:name="Image10" text:anchor-type="char" svg:x="-0.011cm" svg:y="0.584cm" svg:width="12.18cm" svg:height="4.99cm" draw:z-index="9"><draw:image xlink:href="Pictures/1000000100000448000001C13FA06B31B813B96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1" text:anchor-type="char" svg:x="0.062cm" svg:y="0.545cm" svg:width="11.98cm" svg:height="6.989cm" draw:z-index="10"><draw:image xlink:href="Pictures/10000001000003F00000024C5DE395F7ED11420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2" text:anchor-type="char" svg:x="-0.501cm" svg:y="0.055cm" svg:width="11.227cm" svg:height="10.553cm" draw:z-index="11"><draw:image xlink:href="Pictures/100000010000028A000002632ACD1616CE9B6520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3" text:anchor-type="char" svg:x="-0.025cm" svg:y="0.171cm" svg:width="10.989cm" svg:height="8.733cm" draw:z-index="12"><draw:image xlink:href="Pictures/100000010000028800000203A60312EA8C33480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4" text:anchor-type="char" svg:x="-0.037cm" svg:y="0.598cm" svg:width="12.525cm" svg:height="4.643cm" draw:z-index="13"><draw:image xlink:href="Pictures/10000001000003BB0000016214556A6CD413C84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5" text:anchor-type="char" svg:x="0.023cm" svg:y="-0.295cm" svg:width="10.102cm" svg:height="5.426cm" draw:z-index="14"><draw:image xlink:href="Pictures/10000001000003D700000210CD20995368C4F6AF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6" text:anchor-type="char" svg:x="-0.016cm" svg:y="0.612cm" svg:width="10.181cm" svg:height="4.942cm" draw:z-index="15"><draw:image xlink:href="Pictures/100000010000031700000180497454136B7BF5C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Operators</text:p>
      <text:p text:style-name="P9"/>
      <text:p text:style-name="P9"><draw:frame draw:style-name="fr1" draw:name="Image17" text:anchor-type="char" svg:x="-0.353cm" svg:y="0.078cm" svg:width="11.382cm" svg:height="3.697cm" draw:z-index="16"><draw:image xlink:href="Pictures/10000001000003D30000013E0E5F00F0A98DAE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1" draw:name="Image18" text:anchor-type="char" svg:x="-0.182cm" svg:y="0.492cm" svg:width="10.963cm" svg:height="5.262cm" draw:z-index="17"><draw:image xlink:href="Pictures/1000000100000380000001AE7C3DB5387574A98E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Image19" text:anchor-type="char" svg:x="-0.182cm" svg:y="2.831cm" svg:width="6.673cm" svg:height="5.745cm" draw:z-index="18"><draw:image xlink:href="Pictures/10000001000002C900000266D6B532C8771B08D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0" text:anchor-type="char" svg:x="-0.116cm" svg:y="-0.716cm" svg:width="10.356cm" svg:height="8.532cm" draw:z-index="19"><draw:image xlink:href="Pictures/10000001000002C000000244C8B68A37AFB1621F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1" text:anchor-type="char" svg:x="0.136cm" svg:y="0.185cm" svg:width="10.698cm" svg:height="7.89cm" draw:z-index="20"><draw:image xlink:href="Pictures/10000001000003330000025CCD3475FEC99475F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2" text:anchor-type="char" svg:x="0.332cm" svg:y="0.598cm" svg:width="11.709cm" svg:height="7.303cm" draw:z-index="21"><draw:image xlink:href="Pictures/10000001000003C2000002583ABD08E38E785E4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23" text:anchor-type="char" svg:x="-0.54cm" svg:y="0.289cm" svg:width="11.227cm" svg:height="5.625cm" draw:z-index="22"><draw:image xlink:href="Pictures/10000001000003CC000001E7EBC8A971DA5FD0E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4" text:anchor-type="char" svg:x="-0.543cm" svg:y="0.651cm" svg:width="12.666cm" svg:height="8.174cm" draw:z-index="23"><draw:image xlink:href="Pictures/100000010000036D0000023640F4F6E788B478F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Functions</text:p>
      <text:p text:style-name="P10"><draw:frame draw:style-name="fr1" draw:name="Image25" text:anchor-type="char" svg:x="-0.049cm" svg:y="0.466cm" svg:width="13.159cm" svg:height="4.812cm" draw:z-index="24"><draw:image xlink:href="Pictures/10000001000004430000018F2F98DD69D3FE2803.png" xlink:type="simple" xlink:show="embed" xlink:actuate="onLoad" draw:mime-type="image/png"/></draw:frame></text:p>
      <text:p text:style-name="P10"/>
      <text:p text:style-name="P9"/>
      <text:p text:style-name="P9"/>
      <text:p text:style-name="P9"/>
      <text:p text:style-name="P9"/>
      <text:p text:style-name="P9"/>
      <text:p text:style-name="P9"><draw:frame draw:style-name="fr1" draw:name="Image26" text:anchor-type="char" svg:x="0.194cm" svg:y="0.24cm" svg:width="12.063cm" svg:height="4.957cm" draw:z-index="25"><draw:image xlink:href="Pictures/10000001000005250000021D19E3A3ED1490691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1" draw:name="Image27" text:anchor-type="char" svg:x="0.155cm" svg:y="0.104cm" svg:width="11.795cm" svg:height="6.435cm" draw:z-index="26"><draw:image xlink:href="Pictures/10000001000003DE0000021C3670219744C9F4B9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Strings</text:p>
      <text:p text:style-name="P11"><draw:frame draw:style-name="fr1" draw:name="Image28" text:anchor-type="char" svg:x="0.06cm" svg:y="0.453cm" svg:width="11.855cm" svg:height="5.285cm" draw:z-index="27"><draw:image xlink:href="Pictures/10000001000004F800000237A747DD2FF2F1428D.png" xlink:type="simple" xlink:show="embed" xlink:actuate="onLoad" draw:mime-type="image/png"/></draw:frame>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9" text:anchor-type="char" svg:x="0.157cm" svg:y="0.572cm" svg:width="13.035cm" svg:height="3.399cm" draw:z-index="28"><draw:image xlink:href="Pictures/10000001000004410000011C5FE7A1E78CA0208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1" draw:name="Image30" text:anchor-type="char" svg:x="0.22cm" svg:y="0.621cm" svg:width="13.25cm" svg:height="4.685cm" draw:z-index="29"><draw:image xlink:href="Pictures/10000001000004080000016DC01FD9B803DDE1C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1" text:anchor-type="char" svg:x="0.288cm" svg:y="0.407cm" svg:width="12.615cm" svg:height="4.588cm" draw:z-index="30"><draw:image xlink:href="Pictures/100000010000043E0000018B9F0B3BD61CCC17A5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Image32" text:anchor-type="char" svg:x="-0.187cm" svg:y="0.462cm" svg:width="11.767cm" svg:height="6.23cm" draw:z-index="31"><draw:image xlink:href="Pictures/100000010000044B00000246C5B607FC5BA90D42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3" text:anchor-type="char" svg:x="-0.272cm" svg:y="0.556cm" svg:width="11.642cm" svg:height="5.346cm" draw:z-index="32"><draw:image xlink:href="Pictures/100000010000045D000002019392CCFFF475320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4" text:anchor-type="char" svg:x="-0.229cm" svg:y="0.307cm" svg:width="11.398cm" svg:height="5.542cm" draw:z-index="33"><draw:image xlink:href="Pictures/10000001000003D7000001DE839099CEBD46319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Console input and output</text:p>
      <text:p text:style-name="P12"><draw:frame draw:style-name="fr1" draw:name="Image35" text:anchor-type="char" svg:x="0.002cm" svg:y="0.372cm" svg:width="10.59cm" svg:height="5.733cm" draw:z-index="34"><draw:image xlink:href="Pictures/10000001000003B200000200BEA3A39907EDC0C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36" text:anchor-type="char" svg:x="-0.376cm" svg:y="0.182cm" svg:width="9.606cm" svg:height="5.731cm" draw:z-index="35"><draw:image xlink:href="Pictures/10000001000003B30000023515DDDD3A152EC40A.png" xlink:type="simple" xlink:show="embed" xlink:actuate="onLoad" draw:mime-type="image/png"/></draw:frame><draw:frame draw:style-name="fr1" draw:name="Image37" text:anchor-type="char" svg:x="9.091cm" svg:y="-0.268cm" svg:width="9.451cm" svg:height="7.006cm" draw:z-index="36"><draw:image xlink:href="Pictures/10000001000003300000025DAF7875C1E4CC5A2D.png" xlink:type="simple" xlink:show="embed" xlink:actuate="onLoad" draw:mime-type="image/png"/></draw:frame><draw:frame draw:style-name="fr1" draw:name="Image38" text:anchor-type="char" svg:x="-0.861cm" svg:y="6.272cm" svg:width="9.825cm" svg:height="7.078cm" draw:z-index="37"><draw:image xlink:href="Pictures/100000010000039400000294853A01BA23227151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arsing</text:p>
      <text:p text:style-name="P12"><draw:frame draw:style-name="fr1" draw:name="Image39" text:anchor-type="char" svg:x="-2.013cm" svg:y="0.4cm" svg:width="11.266cm" svg:height="7.599cm" draw:z-index="38"><draw:image xlink:href="Pictures/10000001000003970000026C4F1329FFEF8431CE.png" xlink:type="simple" xlink:show="embed" xlink:actuate="onLoad" draw:mime-type="image/png"/></draw:frame><draw:frame draw:style-name="fr1" draw:name="Image40" text:anchor-type="char" svg:x="8.837cm" svg:y="0.337cm" svg:width="10.019cm" svg:height="4.979cm" draw:z-index="39"><draw:image xlink:href="Pictures/100000010000040600000200DB5D8EA42724617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41" text:anchor-type="char" svg:x="-1.64cm" svg:y="0.039cm" svg:width="12.577cm" svg:height="4.983cm" draw:z-index="40"><draw:image xlink:href="Pictures/10000001000004EE000001F4E982329CA549B469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>Debugging</text:p>
      <text:p text:style-name="P13"><draw:frame draw:style-name="fr1" draw:name="Image42" text:anchor-type="char" svg:x="-0.545cm" svg:y="0.413cm" svg:width="10.075cm" svg:height="4.886cm" draw:z-index="41"><draw:image xlink:href="Pictures/100000010000035E000001A2DCD694487570F32D.png" xlink:type="simple" xlink:show="embed" xlink:actuate="onLoad" draw:mime-type="image/png"/></draw:frame></text:p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23">Conditional instructions</text:p>
      <text:p text:style-name="P23"/>
      <text:p text:style-name="P23">Logical and comparison operators</text:p>
      <text:h text:style-name="P14" text:outline-level="1">Equity Operators</text:h>
      <text:p text:style-name="P27"><text:span text:style-name="T4">== evaluates to </text:span><text:span text:style-name="Source_20_Text"><text:span text:style-name="T7">True</text:span></text:span><text:span text:style-name="T4"> if values are equal</text:span></text:p>
      <table:table table:name="Table5" table:style-name="Table5">
        <table:table-column table:style-name="Table5.A"/>
        <table:table-row table:style-name="TableLine2213451785952">
          <table:table-cell table:style-name="Table5.A1" office:value-type="string">
            <text:p text:style-name="Table_20_Contents"><text:span text:style-name="T15">print</text:span>(<text:span text:style-name="T16">1</text:span> == <text:span text:style-name="T16">1</text:span>) <text:span text:style-name="T17"># True</text:span></text:p>
          </table:table-cell>
        </table:table-row>
        <table:table-row table:style-name="TableLine2213451785952">
          <table:table-cell table:style-name="Table5.A1" office:value-type="string">
            <text:p text:style-name="Table_20_Contents"><text:span text:style-name="T15">print</text:span>(<text:span text:style-name="T16">2</text:span> == <text:span text:style-name="T16">3</text:span>) <text:span text:style-name="T17"># False</text:span></text:p>
          </table:table-cell>
        </table:table-row>
        <table:table-row table:style-name="TableLine2213451785952">
          <table:table-cell table:style-name="Table5.A1" office:value-type="string">
            <text:p text:style-name="Table_20_Contents"><text:span text:style-name="T15">print</text:span>(<text:span text:style-name="T18">'Telerik'</text:span> == <text:span text:style-name="T18">'telerik'</text:span>) <text:span text:style-name="T17"># False</text:span></text:p>
          </table:table-cell>
        </table:table-row>
      </table:table>
      <text:p text:style-name="P27"><text:span text:style-name="T4"/></text:p>
      <text:p text:style-name="P27"><text:span text:style-name="T4">!= evaluates to </text:span><text:span text:style-name="Source_20_Text"><text:span text:style-name="T7">True</text:span></text:span><text:span text:style-name="T4"> if values are </text:span><text:span text:style-name="Strong_20_Emphasis"><text:span text:style-name="T4">not</text:span></text:span><text:span text:style-name="T4"> equal</text:span></text:p>
      <table:table table:name="Table6" table:style-name="Table6">
        <table:table-column table:style-name="Table6.A"/>
        <table:table-row table:style-name="TableLine2213451788832">
          <table:table-cell table:style-name="Table6.A1" office:value-type="string">
            <text:p text:style-name="Table_20_Contents"><text:span text:style-name="T15">print</text:span>(<text:span text:style-name="T16">1</text:span> != <text:span text:style-name="T16">1</text:span>) <text:span text:style-name="T17"># False</text:span></text:p>
          </table:table-cell>
        </table:table-row>
        <table:table-row table:style-name="TableLine2213451788832">
          <table:table-cell table:style-name="Table6.A1" office:value-type="string">
            <text:p text:style-name="Table_20_Contents"><text:span text:style-name="T15">print</text:span>(<text:span text:style-name="T16">2</text:span> != <text:span text:style-name="T16">3</text:span>) <text:span text:style-name="T17"># True</text:span></text:p>
          </table:table-cell>
        </table:table-row>
        <table:table-row table:style-name="TableLine2213451788832">
          <table:table-cell table:style-name="Table6.A1" office:value-type="string">
            <text:p text:style-name="Table_20_Contents"><text:span text:style-name="T15">print</text:span>(<text:span text:style-name="T18">'Telerik'</text:span> != <text:span text:style-name="T18">'telerik'</text:span>) <text:span text:style-name="T17"># True</text:span></text:p>
          </table:table-cell>
        </table:table-row>
      </table:table>
      <text:h text:style-name="P15" text:outline-level="1"><text:span text:style-name="T6">Comparison Operators</text:span></text:h>
      <text:p text:style-name="P27"><text:span text:style-name="T4">The operators </text:span><text:span text:style-name="Strong_20_Emphasis"><text:span text:style-name="T4">&gt;, &lt;, &lt;=,</text:span></text:span><text:span text:style-name="T4"> and </text:span><text:span text:style-name="Strong_20_Emphasis"><text:span text:style-name="T4">&gt;=</text:span></text:span><text:span text:style-name="T4"> compare numeric types</text:span></text:p>
      <table:table table:name="Table7" table:style-name="Table7">
        <table:table-column table:style-name="Table7.A"/>
        <table:table-row table:style-name="TableLine2213451665568">
          <table:table-cell table:style-name="Table7.A1" office:value-type="string">
            <text:p text:style-name="Table_20_Contents"><text:span text:style-name="T15">print</text:span>(<text:span text:style-name="T16">1</text:span> &gt; <text:span text:style-name="T16">1</text:span>) <text:span text:style-name="T17"># False</text:span></text:p>
          </table:table-cell>
        </table:table-row>
        <table:table-row table:style-name="TableLine2213451665568">
          <table:table-cell table:style-name="Table7.A1" office:value-type="string">
            <text:p text:style-name="Table_20_Contents"><text:span text:style-name="T15">print</text:span>(<text:span text:style-name="T16">1</text:span> &gt;= <text:span text:style-name="T16">1</text:span>) <text:span text:style-name="T17"># True</text:span></text:p>
          </table:table-cell>
        </table:table-row>
      </table:table>
      <text:p text:style-name="P44"><text:span text:style-name="T6"/></text:p>
      <text:p text:style-name="P44">Strings can be compared for alphabetical order</text:p>
      <text:list xml:id="list2500035077" text:style-name="L2">
        <text:list-item>
          <text:p text:style-name="P36">Uppercase letters have a lower order than lowercase</text:p>
        </text:list-item>
      </text:list>
      <table:table table:name="Table8" table:style-name="Table8">
        <table:table-column table:style-name="Table8.A"/>
        <text:soft-page-break/>
        <table:table-row table:style-name="TableLine2213451667008">
          <table:table-cell table:style-name="Table8.A1" office:value-type="string">
            <text:p text:style-name="Table_20_Contents"><text:span text:style-name="T15">print</text:span>(<text:span text:style-name="T18">'apple'</text:span> &lt; <text:span text:style-name="T18">'banana'</text:span>) <text:span text:style-name="T17"># True</text:span></text:p>
          </table:table-cell>
        </table:table-row>
        <table:table-row table:style-name="TableLine2213451667008">
          <table:table-cell table:style-name="Table8.A1" office:value-type="string">
            <text:p text:style-name="Table_20_Contents"><text:span text:style-name="T15">print</text:span>(<text:span text:style-name="T18">'apple'</text:span> &lt; <text:span text:style-name="T18">'Banana'</text:span>) <text:span text:style-name="T17"># False</text:span></text:p>
          </table:table-cell>
        </table:table-row>
      </table:table>
      <text:h text:style-name="P15" text:outline-level="1"><text:span text:style-name="T6">Logical Operators</text:span></text:h>
      <text:p text:style-name="P27"><text:span text:style-name="T4">Operators that perform logical calculations with </text:span><text:span text:style-name="Strong_20_Emphasis"><text:span text:style-name="T4">bool</text:span></text:span><text:span text:style-name="T4"> values</text:span></text:p>
      <text:list xml:id="list1452549141" text:style-name="L3">
        <text:list-item>
          <text:p text:style-name="P28"><text:span text:style-name="Source_20_Text"><text:span text:style-name="T7">and</text:span></text:span><text:span text:style-name="T4"> - both values must be </text:span><text:span text:style-name="Source_20_Text"><text:span text:style-name="T7">True</text:span></text:span></text:p>
        </text:list-item>
        <text:list-item>
          <text:p text:style-name="P28"><text:span text:style-name="Source_20_Text"><text:span text:style-name="T7">or</text:span></text:span><text:span text:style-name="T4"> - one value must be </text:span><text:span text:style-name="Source_20_Text"><text:span text:style-name="T7">True</text:span></text:span></text:p>
        </text:list-item>
        <text:list-item>
          <text:p text:style-name="P29"><text:span text:style-name="Source_20_Text"><text:span text:style-name="T7">not</text:span></text:span><text:span text:style-name="T4"> - flips </text:span><text:span text:style-name="Source_20_Text"><text:span text:style-name="T7">True</text:span></text:span><text:span text:style-name="T4"> to </text:span><text:span text:style-name="Source_20_Text"><text:span text:style-name="T7">False</text:span></text:span><text:span text:style-name="T4"> and </text:span><text:span text:style-name="Source_20_Text"><text:span text:style-name="T7">False</text:span></text:span><text:span text:style-name="T4"> to </text:span><text:span text:style-name="Source_20_Text"><text:span text:style-name="T7">True</text:span></text:span></text:p>
        </text:list-item>
      </text:list>
      <table:table table:name="Table9" table:style-name="Table9">
        <table:table-column table:style-name="Table9.A"/>
        <table:table-row table:style-name="TableLine2213470588304">
          <table:table-cell table:style-name="Table9.A1" office:value-type="string">
            <text:p text:style-name="Table_20_Contents">name = <text:span text:style-name="T18">'Pesho'</text:span></text:p>
          </table:table-cell>
        </table:table-row>
        <table:table-row table:style-name="TableLine2213470588304">
          <table:table-cell table:style-name="Table9.A1" office:value-type="string">
            <text:p text:style-name="Table_20_Contents">age = <text:span text:style-name="T16">25</text:span></text:p>
          </table:table-cell>
        </table:table-row>
        <table:table-row table:style-name="TableLine2213470588304">
          <table:table-cell table:style-name="Table9.A1" office:value-type="string">
            <text:p text:style-name="Table_20_Contents"><text:span text:style-name="T15">print</text:span>(name == <text:span text:style-name="T18">'Pesho'</text:span> <text:span text:style-name="T19">and</text:span> age &gt; <text:span text:style-name="T16">30</text:span>) <text:span text:style-name="T17"># False</text:span></text:p>
          </table:table-cell>
        </table:table-row>
        <table:table-row table:style-name="TableLine2213470588304">
          <table:table-cell table:style-name="Table9.A1" office:value-type="string">
            <text:p text:style-name="Table_20_Contents"><text:span text:style-name="T15">print</text:span>(age &gt; <text:span text:style-name="T16">20</text:span> <text:span text:style-name="T19">and</text:span> age &lt; <text:span text:style-name="T16">30</text:span>) <text:span text:style-name="T17"># True</text:span></text:p>
          </table:table-cell>
        </table:table-row>
        <table:table-row table:style-name="TableLine2213470588304">
          <table:table-cell table:style-name="Table9.A1" office:value-type="string">
            <text:p text:style-name="Table_20_Contents"><text:span text:style-name="T15">print</text:span>(name == <text:span text:style-name="T18">'Pesho'</text:span> <text:span text:style-name="T19">or</text:span> age &gt; <text:span text:style-name="T16">30</text:span>) <text:span text:style-name="T17"># True</text:span></text:p>
          </table:table-cell>
        </table:table-row>
        <table:table-row table:style-name="TableLine2213470588304">
          <table:table-cell table:style-name="Table9.A1" office:value-type="string">
            <text:p text:style-name="Table_20_Contents"><text:span text:style-name="T15">print</text:span>( <text:span text:style-name="T19">not</text:span> (name == <text:span text:style-name="T18">'Pesho'</text:span>)) <text:span text:style-name="T17"># False</text:span></text:p>
          </table:table-cell>
        </table:table-row>
      </table:table>
      <text:p text:style-name="P34"><text:span text:style-name="T6"/></text:p>
      <text:h text:style-name="P14" text:outline-level="1">Truth Table - conditional logical operators tabl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Line2213470590032">
            <table:table-cell table:style-name="Table10.A1" office:value-type="string">
              <text:p text:style-name="Table_20_Heading">value A</text:p>
            </table:table-cell>
            <table:table-cell table:style-name="Table10.A1" office:value-type="string">
              <text:p text:style-name="Table_20_Heading">value B</text:p>
            </table:table-cell>
            <table:table-cell table:style-name="Table10.A1" office:value-type="string">
              <text:p text:style-name="Table_20_Heading">A and B</text:p>
            </table:table-cell>
            <table:table-cell table:style-name="Table10.A1" office:value-type="string">
              <text:p text:style-name="Table_20_Heading">A or B</text:p>
            </table:table-cell>
          </table:table-row>
        </table:table-header-rows>
        <table:table-row table:style-name="TableLine2213470590032">
          <table:table-cell table:style-name="Table10.A1" office:value-type="string">
            <text:p text:style-name="Table_20_Contents">True</text:p>
          </table:table-cell>
          <table:table-cell table:style-name="Table10.A1" office:value-type="string">
            <text:p text:style-name="Table_20_Contents">True</text:p>
          </table:table-cell>
          <table:table-cell table:style-name="Table10.A1" office:value-type="string">
            <text:p text:style-name="Table_20_Contents"><text:span text:style-name="Source_20_Text"><text:span text:style-name="T3">True</text:span></text:span></text:p>
          </table:table-cell>
          <table:table-cell table:style-name="Table10.A1" office:value-type="string">
            <text:p text:style-name="Table_20_Contents"><text:span text:style-name="Source_20_Text"><text:span text:style-name="T3">True</text:span></text:span></text:p>
          </table:table-cell>
        </table:table-row>
        <table:table-row table:style-name="Table10.3">
          <table:table-cell table:style-name="Table10.A1" office:value-type="string">
            <text:p text:style-name="Table_20_Contents">True</text:p>
          </table:table-cell>
          <table:table-cell table:style-name="Table10.A1" office:value-type="string">
            <text:p text:style-name="Table_20_Contents">False</text:p>
          </table:table-cell>
          <table:table-cell table:style-name="Table10.A1" office:value-type="string">
            <text:p text:style-name="Table_20_Contents"><text:span text:style-name="Strong_20_Emphasis">False</text:span></text:p>
          </table:table-cell>
          <table:table-cell table:style-name="Table10.A1" office:value-type="string">
            <text:p text:style-name="Table_20_Contents"><text:span text:style-name="Source_20_Text"><text:span text:style-name="T3">True</text:span></text:span></text:p>
          </table:table-cell>
        </table:table-row>
        <table:table-row table:style-name="TableLine2213470590032">
          <table:table-cell table:style-name="Table10.A1" office:value-type="string">
            <text:p text:style-name="Table_20_Contents">False</text:p>
          </table:table-cell>
          <table:table-cell table:style-name="Table10.A1" office:value-type="string">
            <text:p text:style-name="Table_20_Contents">True</text:p>
          </table:table-cell>
          <table:table-cell table:style-name="Table10.A1" office:value-type="string">
            <text:p text:style-name="Table_20_Contents"><text:span text:style-name="Strong_20_Emphasis">False</text:span></text:p>
          </table:table-cell>
          <table:table-cell table:style-name="Table10.A1" office:value-type="string">
            <text:p text:style-name="Table_20_Contents"><text:span text:style-name="Source_20_Text"><text:span text:style-name="T3">True</text:span></text:span></text:p>
          </table:table-cell>
        </table:table-row>
        <table:table-row table:style-name="Table10.3">
          <table:table-cell table:style-name="Table10.A1" office:value-type="string">
            <text:p text:style-name="Table_20_Contents">False</text:p>
          </table:table-cell>
          <table:table-cell table:style-name="Table10.A1" office:value-type="string">
            <text:p text:style-name="Table_20_Contents">False</text:p>
          </table:table-cell>
          <table:table-cell table:style-name="Table10.A1" office:value-type="string">
            <text:p text:style-name="Table_20_Contents"><text:span text:style-name="Strong_20_Emphasis">False</text:span></text:p>
          </table:table-cell>
          <table:table-cell table:style-name="Table10.A1" office:value-type="string">
            <text:p text:style-name="Table_20_Contents"><text:span text:style-name="Strong_20_Emphasis">False</text:span></text:p>
          </table:table-cell>
        </table:table-row>
      </table:table>
      <text:p text:style-name="P34"><text:span text:style-name="T6"/></text:p>
      <text:h text:style-name="P14" text:outline-level="1">Operator Precedence Table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Line2213470587152">
            <table:table-cell table:style-name="Table11.A1" office:value-type="string">
              <text:p text:style-name="Table_20_Heading">Precedence</text:p>
            </table:table-cell>
            <table:table-cell table:style-name="Table11.A1" office:value-type="string">
              <text:p text:style-name="Table_20_Heading">Operators</text:p>
            </table:table-cell>
            <table:table-cell table:style-name="Table11.A1" office:value-type="string">
              <text:p text:style-name="Table_20_Heading">Description</text:p>
            </table:table-cell>
          </table:table-row>
        </table:table-header-rows>
        <table:table-row table:style-name="TableLine2213470587152">
          <table:table-cell table:style-name="Table11.A1" office:value-type="string">
            <text:p text:style-name="Table_20_Contents"><text:span text:style-name="Emphasis"><text:span text:style-name="Strong_20_Emphasis">Highest</text:span></text:span></text:p>
          </table:table-cell>
          <table:table-cell table:style-name="Table11.A1" office:value-type="string">
            <text:p text:style-name="Table_20_Contents"><text:span text:style-name="Source_20_Text"><text:span text:style-name="T3">()</text:span></text:span></text:p>
          </table:table-cell>
          <table:table-cell table:style-name="Table11.A1" office:value-type="string">
            <text:p text:style-name="Table_20_Contents">Parentheses</text:p>
          </table:table-cell>
        </table:table-row>
        <table:table-row table:style-name="Table11.3">
          <table:table-cell table:style-name="Table11.A1" office:value-type="string">
            <text:p text:style-name="P24"/>
          </table:table-cell>
          <table:table-cell table:style-name="Table11.A1" office:value-type="string">
            <text:p text:style-name="Table_20_Contents"><text:span text:style-name="Source_20_Text"><text:span text:style-name="T3">**</text:span></text:span></text:p>
          </table:table-cell>
          <table:table-cell table:style-name="Table11.A1" office:value-type="string">
            <text:p text:style-name="Table_20_Contents">Exponentiation</text:p>
          </table:table-cell>
        </table:table-row>
        <table:table-row table:style-name="TableLine2213470587152">
          <table:table-cell table:style-name="Table11.A1" office:value-type="string">
            <text:p text:style-name="P24"/>
          </table:table-cell>
          <table:table-cell table:style-name="Table11.A1" office:value-type="string">
            <text:p text:style-name="Table_20_Contents"><text:span text:style-name="Source_20_Text"><text:span text:style-name="T3">*</text:span></text:span>, <text:span text:style-name="Source_20_Text"><text:span text:style-name="T3">/</text:span></text:span>, <text:span text:style-name="Source_20_Text"><text:span text:style-name="T3">//</text:span></text:span>, <text:span text:style-name="Source_20_Text"><text:span text:style-name="T3">%</text:span></text:span></text:p>
          </table:table-cell>
          <table:table-cell table:style-name="Table11.A1" office:value-type="string">
            <text:p text:style-name="Table_20_Contents">Multiplication, Division, Floor division, Modulus</text:p>
          </table:table-cell>
        </table:table-row>
        <table:table-row table:style-name="Table11.3">
          <table:table-cell table:style-name="Table11.A1" office:value-type="string">
            <text:p text:style-name="P24"/>
          </table:table-cell>
          <table:table-cell table:style-name="Table11.A1" office:value-type="string">
            <text:p text:style-name="Table_20_Contents"><text:span text:style-name="Source_20_Text"><text:span text:style-name="T3">+</text:span></text:span>, <text:span text:style-name="Source_20_Text"><text:span text:style-name="T3">-</text:span></text:span></text:p>
          </table:table-cell>
          <table:table-cell table:style-name="Table11.A1" office:value-type="string">
            <text:p text:style-name="Table_20_Contents">Addition, Subtraction</text:p>
          </table:table-cell>
        </table:table-row>
        <table:table-row table:style-name="TableLine2213470587152">
          <table:table-cell table:style-name="Table11.A1" office:value-type="string">
            <text:p text:style-name="P24"/>
          </table:table-cell>
          <table:table-cell table:style-name="Table11.A1" office:value-type="string">
            <text:p text:style-name="Table_20_Contents"><text:span text:style-name="Source_20_Text"><text:span text:style-name="T3">&lt;</text:span></text:span>, <text:span text:style-name="Source_20_Text"><text:span text:style-name="T3">&gt;</text:span></text:span>, <text:span text:style-name="Source_20_Text"><text:span text:style-name="T3">&lt;=</text:span></text:span>, <text:span text:style-name="Source_20_Text"><text:span text:style-name="T3">&gt;=</text:span></text:span></text:p>
          </table:table-cell>
          <table:table-cell table:style-name="Table11.A1" office:value-type="string">
            <text:p text:style-name="Table_20_Contents">Comparison operators</text:p>
          </table:table-cell>
        </table:table-row>
        <table:table-row table:style-name="Table11.3">
          <table:table-cell table:style-name="Table11.A1" office:value-type="string">
            <text:p text:style-name="P24"/>
          </table:table-cell>
          <table:table-cell table:style-name="Table11.A1" office:value-type="string">
            <text:p text:style-name="Table_20_Contents"><text:span text:style-name="Source_20_Text"><text:span text:style-name="T3">==</text:span></text:span>, <text:span text:style-name="Source_20_Text"><text:span text:style-name="T3">!=</text:span></text:span></text:p>
          </table:table-cell>
          <table:table-cell table:style-name="Table11.A1" office:value-type="string">
            <text:p text:style-name="Table_20_Contents">Equality operators</text:p>
          </table:table-cell>
        </table:table-row>
        <table:table-row table:style-name="TableLine2213470587152">
          <table:table-cell table:style-name="Table11.A1" office:value-type="string">
            <text:p text:style-name="P24"/>
          </table:table-cell>
          <table:table-cell table:style-name="Table11.A1" office:value-type="string">
            <text:p text:style-name="Table_20_Contents"><text:span text:style-name="Source_20_Text"><text:span text:style-name="T3">not</text:span></text:span></text:p>
          </table:table-cell>
          <table:table-cell table:style-name="Table11.A1" office:value-type="string">
            <text:p text:style-name="Table_20_Contents">Logical NOT</text:p>
          </table:table-cell>
        </table:table-row>
        <text:soft-page-break/>
        <table:table-row table:style-name="Table11.3">
          <table:table-cell table:style-name="Table11.A1" office:value-type="string">
            <text:p text:style-name="P24"/>
          </table:table-cell>
          <table:table-cell table:style-name="Table11.A1" office:value-type="string">
            <text:p text:style-name="Table_20_Contents"><text:span text:style-name="Source_20_Text"><text:span text:style-name="T3">and</text:span></text:span></text:p>
          </table:table-cell>
          <table:table-cell table:style-name="Table11.A1" office:value-type="string">
            <text:p text:style-name="Table_20_Contents">Logical AND</text:p>
          </table:table-cell>
        </table:table-row>
        <table:table-row table:style-name="TableLine2213470587152">
          <table:table-cell table:style-name="Table11.A1" office:value-type="string">
            <text:p text:style-name="Table_20_Contents"><text:span text:style-name="Emphasis"><text:span text:style-name="Strong_20_Emphasis">Lowest</text:span></text:span></text:p>
          </table:table-cell>
          <table:table-cell table:style-name="Table11.A1" office:value-type="string">
            <text:p text:style-name="Table_20_Contents"><text:span text:style-name="Source_20_Text"><text:span text:style-name="T3">or</text:span></text:span></text:p>
          </table:table-cell>
          <table:table-cell table:style-name="Table11.A1" office:value-type="string">
            <text:p text:style-name="Table_20_Contents">Logical OR</text:p>
          </table:table-cell>
        </table:table-row>
      </table:table>
      <text:p text:style-name="P27"><text:span text:style-name="T4">Note: Prefer adding </text:span><text:span text:style-name="Source_20_Text"><text:span text:style-name="T7">()</text:span></text:span><text:span text:style-name="T4"> to expressions for clarity and readability</text:span></text:p>
      <text:h text:style-name="P16" text:outline-level="1"><text:span text:style-name="T6">Expressions and Statements</text:span></text:h>
      <text:h text:style-name="P14" text:outline-level="1">Statements</text:h>
      <text:p text:style-name="P35">Python code is built out of statements</text:p>
      <text:list xml:id="list729058076" text:style-name="L4">
        <text:list-item>
          <text:p text:style-name="P37">Statements are used to instruct Python what to do</text:p>
        </text:list-item>
        <text:list-item>
          <text:p text:style-name="P38">One line is usually equal to one statement</text:p>
        </text:list-item>
      </text:list>
      <table:table table:name="Table12" table:style-name="Table12">
        <table:table-column table:style-name="Table12.A"/>
        <table:table-row table:style-name="TableLine2213470605296">
          <table:table-cell table:style-name="Table12.A1" office:value-type="string">
            <text:p text:style-name="Table_20_Contents">x = <text:span text:style-name="T16">5</text:span></text:p>
          </table:table-cell>
        </table:table-row>
        <table:table-row table:style-name="TableLine2213470605296">
          <table:table-cell table:style-name="Table12.A1" office:value-type="string">
            <text:p text:style-name="Table_20_Contents">y = <text:span text:style-name="T16">12</text:span></text:p>
          </table:table-cell>
        </table:table-row>
        <table:table-row table:style-name="TableLine2213470605296">
          <table:table-cell table:style-name="Table12.A1" office:value-type="string">
            <text:p text:style-name="Table_20_Contents">name = <text:span text:style-name="T18">'John'</text:span></text:p>
          </table:table-cell>
        </table:table-row>
      </table:table>
      <text:p text:style-name="P34"><text:span text:style-name="T4"/></text:p>
      <text:p text:style-name="P34"><text:span text:style-name="T4">One line can contain more than one statement by delimiting with </text:span><text:span text:style-name="Source_20_Text"><text:span text:style-name="T7">;</text:span></text:span></text:p>
      <text:p text:style-name="P18"><text:span text:style-name="Source_20_Text"><text:span text:style-name="T8">x = </text:span></text:span><text:span text:style-name="Source_20_Text"><text:span text:style-name="T9">5</text:span></text:span><text:span text:style-name="Source_20_Text"><text:span text:style-name="T8">; y = </text:span></text:span><text:span text:style-name="Source_20_Text"><text:span text:style-name="T9">12</text:span></text:span><text:span text:style-name="Source_20_Text"><text:span text:style-name="T8">; name = </text:span></text:span><text:span text:style-name="Source_20_Text"><text:span text:style-name="T10">'John'</text:span></text:span></text:p>
      <text:h text:style-name="P17" text:outline-level="1"><text:span text:style-name="Source_20_Text"><text:span text:style-name="T5">Example Statements</text:span></text:span></text:h>
      <text:p text:style-name="P35">Variable declaration is not the only statement We will soon study</text:p>
      <text:p text:style-name="P35"/>
      <text:list xml:id="list1980977214" text:style-name="L6">
        <text:list-item>
          <text:p text:style-name="P30"><text:span text:style-name="Source_20_Text"><text:span text:style-name="T7">if</text:span></text:span><text:span text:style-name="T4"> / </text:span><text:span text:style-name="Source_20_Text"><text:span text:style-name="T7">elif</text:span></text:span><text:span text:style-name="T4"> / </text:span><text:span text:style-name="Source_20_Text"><text:span text:style-name="T7">else</text:span></text:span><text:span text:style-name="T4"> to conditionally execute instructions</text:span></text:p>
        </text:list-item>
        <text:list-item>
          <text:p text:style-name="P30"><text:span text:style-name="Source_20_Text"><text:span text:style-name="T7">while</text:span></text:span><text:span text:style-name="T4"> to repeat instructions</text:span></text:p>
        </text:list-item>
        <text:list-item>
          <text:p text:style-name="P30"><text:span text:style-name="Source_20_Text"><text:span text:style-name="T7">for</text:span></text:span><text:span text:style-name="T4"> to loop over sequences</text:span></text:p>
        </text:list-item>
        <text:list-item>
          <text:p text:style-name="P31"><text:span text:style-name="Source_20_Text"><text:span text:style-name="T7">break</text:span></text:span><text:span text:style-name="T4"> / </text:span><text:span text:style-name="Source_20_Text"><text:span text:style-name="T7">continue</text:span></text:span><text:span text:style-name="T4"> to control loops</text:span></text:p>
        </text:list-item>
      </text:list>
      <text:h text:style-name="P17" text:outline-level="1"><text:span text:style-name="Source_20_Text"><text:span text:style-name="T5">Expressions</text:span></text:span></text:h>
      <text:p text:style-name="P27"><text:span text:style-name="T4">An expression is a code unit that is evaluated and </text:span><text:span text:style-name="Strong_20_Emphasis"><text:span text:style-name="T4">produces a value</text:span></text:span></text:p>
      <table:table table:name="Table13" table:style-name="Table13">
        <table:table-column table:style-name="Table13.A"/>
        <table:table-row table:style-name="TableLine2213470598960">
          <table:table-cell table:style-name="Table13.A1" office:value-type="string">
            <text:p text:style-name="Table_20_Contents"><text:span text:style-name="T16">2</text:span> + <text:span text:style-name="T16">3</text:span></text:p>
          </table:table-cell>
        </table:table-row>
        <table:table-row table:style-name="TableLine2213470598960">
          <table:table-cell table:style-name="Table13.A1" office:value-type="string">
            <text:p text:style-name="Table_20_Contents"><text:span text:style-name="T16">7</text:span> * (<text:span text:style-name="T16">2</text:span> + <text:span text:style-name="T16">4</text:span>)</text:p>
          </table:table-cell>
        </table:table-row>
        <table:table-row table:style-name="TableLine2213470598960">
          <table:table-cell table:style-name="Table13.A1" office:value-type="string">
            <text:p text:style-name="Table_20_Contents"><text:span text:style-name="T18">"Hello"</text:span> + <text:span text:style-name="T18">" "</text:span> + <text:span text:style-name="T18">"Python"</text:span></text:p>
          </table:table-cell>
        </table:table-row>
      </table:table>
      <text:p text:style-name="P32"><text:span text:style-name="Source_20_Text"><text:span text:style-name="T5">Statements </text:span></text:span><text:span text:style-name="Source_20_Text"><text:span text:style-name="Strong_20_Emphasis"><text:span text:style-name="T5">cannot</text:span></text:span></text:span><text:span text:style-name="Source_20_Text"><text:span text:style-name="T5"> be used inside expressions</text:span></text:span></text:p>
      <text:p text:style-name="P18"><text:span text:style-name="Source_20_Text"><text:span text:style-name="T8">y = </text:span></text:span><text:span text:style-name="Source_20_Text"><text:span text:style-name="T9">3</text:span></text:span><text:span text:style-name="Source_20_Text"><text:span text:style-name="T8"> + (x = </text:span></text:span><text:span text:style-name="Source_20_Text"><text:span text:style-name="T9">5</text:span></text:span><text:span text:style-name="Source_20_Text"><text:span text:style-name="T8">) </text:span></text:span><text:span text:style-name="Source_20_Text"><text:span text:style-name="T14"># Invalid syntax </text:span></text:span></text:p>
      <text:h text:style-name="P17" text:outline-level="1"><text:span text:style-name="Source_20_Text"><text:span text:style-name="T5">Statements vs Expressions</text:span></text:span></text:h>
      <text:p text:style-name="P27"><text:span text:style-name="T4">Statements </text:span><text:span text:style-name="Strong_20_Emphasis"><text:span text:style-name="T4">never</text:span></text:span><text:span text:style-name="T4"> produce a value</text:span></text:p>
      <text:list xml:id="list1351351919" text:style-name="L8">
        <text:list-item>
          <text:p text:style-name="P39">They act like commands telling Python what to do</text:p>
        </text:list-item>
      </text:list>
      <text:p text:style-name="P27"><text:span text:style-name="T4">Expressions </text:span><text:span text:style-name="Strong_20_Emphasis"><text:span text:style-name="T4">always</text:span></text:span><text:span text:style-name="T4"> produce a value</text:span></text:p>
      <text:list xml:id="list2658508959" text:style-name="L9">
        <text:list-item>
          <text:p text:style-name="P40"><text:soft-page-break/>The created value can be:</text:p>
          <text:list>
            <text:list-item>
              <text:p text:style-name="P40">Used inside bigger expressions</text:p>
            </text:list-item>
            <text:list-item>
              <text:p text:style-name="P40">Assigned to a variable</text:p>
            </text:list-item>
            <text:list-item>
              <text:p text:style-name="P40">Passed to functions</text:p>
            </text:list-item>
            <text:list-item>
              <text:p text:style-name="P33"><text:span text:style-name="T4">Used to control </text:span><text:span text:style-name="Source_20_Text"><text:span text:style-name="T7">if</text:span></text:span><text:span text:style-name="T4"> and </text:span><text:span text:style-name="Source_20_Text"><text:span text:style-name="T7">while</text:span></text:span><text:span text:style-name="T4"> statements</text:span></text:p>
            </text:list-item>
            <text:list-item>
              <text:p text:style-name="P41">Many other examples</text:p>
            </text:list-item>
          </text:list>
        </text:list-item>
      </text:list>
      <text:p text:style-name="P19"><text:span text:style-name="Source_20_Text"><text:span text:style-name="T11">Conditional statements</text:span></text:span></text:p>
      <text:p text:style-name="P19"><text:span text:style-name="Source_20_Text"><text:span text:style-name="T12">if statement<text:line-break/>Used for conditional code execution<text:line-break/><text:line-break/>Relies on bool values<text:line-break/>Indentation is important!<text:line-break/>bool_value = True<text:line-break/> <text:line-break/>print('Always executed')<text:line-break/>if bool_value:<text:line-break/> <text:s text:c="2"/>print("this code is executed only if bool_value is True")<text:line-break/> <text:s text:c="2"/>print("this line also belongs to the 'if' statement") #same indentation as the line above line<text:line-break/> <text:line-break/>print('always executed')</text:span></text:span></text:p>
      <text:h text:style-name="P17" text:outline-level="1"><text:span text:style-name="Source_20_Text"><text:span text:style-name="T5">if / else statement</text:span></text:span></text:h>
      <text:p text:style-name="P27"><text:span text:style-name="T4">Adds additional branch to </text:span><text:span text:style-name="Strong_20_Emphasis"><text:span text:style-name="T4">if</text:span></text:span><text:span text:style-name="T4"> statements</text:span></text:p>
      <text:list xml:id="list3934441270" text:style-name="L10">
        <text:list-item>
          <text:p text:style-name="P42">Executed if the condition is False</text:p>
        </text:list-item>
        <text:list-item>
          <text:p text:style-name="P43">Again proper indentation is required</text:p>
        </text:list-item>
      </text:list>
      <table:table table:name="Table14" table:style-name="Table14">
        <table:table-column table:style-name="Table14.A"/>
        <table:table-row table:style-name="TableLine2213451670752">
          <table:table-cell table:style-name="Table14.A1" office:value-type="string">
            <text:p text:style-name="Table_20_Contents">a = <text:span text:style-name="T16">1</text:span></text:p>
          </table:table-cell>
        </table:table-row>
        <table:table-row table:style-name="TableLine2213451670752">
          <table:table-cell table:style-name="Table14.A1" office:value-type="string">
            <text:p text:style-name="Table_20_Contents">b = <text:span text:style-name="T16">2</text:span></text:p>
          </table:table-cell>
        </table:table-row>
        <table:table-row table:style-name="TableLine2213451670752">
          <table:table-cell table:style-name="Table14.A1" office:value-type="string">
            <text:p text:style-name="P24"/>
          </table:table-cell>
        </table:table-row>
        <table:table-row table:style-name="TableLine2213451670752">
          <table:table-cell table:style-name="Table14.A1" office:value-type="string">
            <text:p text:style-name="Table_20_Contents"><text:span text:style-name="T19">if</text:span> a &gt; b:</text:p>
          </table:table-cell>
        </table:table-row>
        <table:table-row table:style-name="TableLine2213451670752">
          <table:table-cell table:style-name="Table14.A1" office:value-type="string">
            <text:p text:style-name="Table_20_Contents"><text:span text:style-name="T15">print</text:span>(<text:span text:style-name="T18">'a is greater than b'</text:span>)</text:p>
          </table:table-cell>
        </table:table-row>
        <table:table-row table:style-name="TableLine2213451670752">
          <table:table-cell table:style-name="Table14.A1" office:value-type="string">
            <text:p text:style-name="Table_20_Contents"><text:span text:style-name="T19">else</text:span>:</text:p>
          </table:table-cell>
        </table:table-row>
        <table:table-row table:style-name="TableLine2213451670752">
          <table:table-cell table:style-name="Table14.A1" office:value-type="string">
            <text:p text:style-name="Table_20_Contents"><text:span text:style-name="T15">print</text:span>(<text:span text:style-name="T18">'b is greater than a'</text:span>)</text:p>
          </table:table-cell>
        </table:table-row>
      </table:table>
      <text:p text:style-name="P19"><text:span text:style-name="Source_20_Text"><text:span text:style-name="T11"/></text:span></text:p>
      <text:p text:style-name="P19"><text:span text:style-name="Source_20_Text"><text:span text:style-name="T11"/></text:span></text:p>
      <text:p text:style-name="P34"><text:span text:style-name="T6"/></text:p>
      <text:p text:style-name="P34"><text:span text:style-name="T6"/></text:p>
      <text:p text:style-name="P23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Montserrat, sans-serif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6T15:48:37.866000000</meta:creation-date>
    <dc:date>2026-06-09T07:51:38.946000000</dc:date>
    <meta:editing-duration>PT34M40S</meta:editing-duration>
    <meta:editing-cycles>5</meta:editing-cycles>
    <meta:generator>LibreOffice/7.3.4.2$Windows_X86_64 LibreOffice_project/728fec16bd5f605073805c3c9e7c4212a0120dc5</meta:generator>
    <meta:document-statistic meta:table-count="14" meta:image-count="42" meta:object-count="0" meta:page-count="16" meta:paragraph-count="173" meta:word-count="1025" meta:character-count="5615" meta:non-whitespace-character-count="4777"/>
  </office:meta>
</office:document-meta>
</file>